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 style:list-style-name="L1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dware</text:p>
      <text:p text:style-name="P2"/>
      <text:list xml:id="list4036495962823786499" text:style-name="L1">
        <text:list-item>
          <text:p text:style-name="P3"><text:span text:style-name="Strong_20_Emphasis"><text:span text:style-name="T1">CPU:</text:span></text:span><text:span text:style-name="Strong_20_Emphasis"><text:span text:style-name="T2">is the processor and the brain of the computer. It carries out instructions and performs the tasks that make the computer work.</text:span></text:span></text:p>
        </text:list-item>
        <text:list-item>
          <text:p text:style-name="P3"><text:span text:style-name="Strong_20_Emphasis"><text:span text:style-name="T1">RAM:i</text:span></text:span><text:span text:style-name="Strong_20_Emphasis"><text:span text:style-name="T2">s temporary memory that allows programs and applications to run quickly while the computer is being used</text:span></text:span></text:p>
        </text:list-item>
        <text:list-item>
          <text:p text:style-name="P3"><text:span text:style-name="T1">SSD:</text:span><text:span text:style-name="Strong_20_Emphasis"><text:span text:style-name="T2">An SSD is permanent storage for a computer. It stores files, programs and Windows itself, and is usually much faster and more efficient than a traditional hard drive</text:span></text:span></text:p>
        </text:list-item>
        <text:list-item>
          <text:p text:style-name="P3"><text:span text:style-name="T3">CAT5e / CAT6:</text:span><text:span text:style-name="Strong_20_Emphasis"><text:span text:style-name="T2">CAT5e and CAT6 are Ethernet cables used for wired network connections. CAT6 is a newer version that supports higher speeds, more bandwidth and longer distances than CAT5e</text:span></text:span></text:p>
        </text:list-item>
        <text:list-item>
          <text:p text:style-name="P3"><text:span text:style-name="Strong_20_Emphasis"><text:span text:style-name="T1">HDMI: </text:span></text:span><text:span text:style-name="Strong_20_Emphasis"><text:span text:style-name="T2">is a cable used to connect devices such as computers, laptops and consoles to monitors, TVs or screens. It carries both video and audio.</text:span></text:span></text:p>
        </text:list-item>
        <text:list-item>
          <text:p text:style-name="P3"><text:span text:style-name="Strong_20_Emphasis"><text:span text:style-name="T1">DisplayPort:</text:span></text:span><text:span text:style-name="Strong_20_Emphasis"><text:span text:style-name="T2">is similar to HDMI and is mainly used to connect computers to monitors. It supports high resolutions and refresh rates.</text:span></text:span></text:p>
        </text:list-item>
        <text:list-item>
          <text:p text:style-name="P3"><text:span text:style-name="Strong_20_Emphasis"><text:span text:style-name="T1">USB-A: </text:span></text:span><text:span text:style-name="Strong_20_Emphasis"><text:span text:style-name="T2">is a common type of USB connection used to connect devices such as keyboards, mice, flash drives and adapters to a computer.</text:span></text:span></text:p>
        </text:list-item>
        <text:list-item>
          <text:p text:style-name="P3"><text:span text:style-name="Strong_20_Emphasis"><text:span text:style-name="T1">USB-C: </text:span></text:span><text:span text:style-name="Strong_20_Emphasis"><text:span text:style-name="T2">is a newer type of USB connection. It is faster, reversible and commonly used for charging, data transfer and connecting modern devices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9H35M35S</meta:editing-duration>
    <meta:editing-cycles>3</meta:editing-cycles>
    <meta:generator>OpenOffice/4.1.12$Win32 OpenOffice.org_project/4112m1$Build-9809</meta:generator>
    <dc:date>2026-07-12T11:07:49.95</dc:date>
    <dc:creator>david chipere</dc:creator>
    <meta:document-statistic meta:table-count="0" meta:image-count="0" meta:object-count="0" meta:page-count="1" meta:paragraph-count="9" meta:word-count="196" meta:character-count="1163"/>
    <meta:user-defined meta:name="Info 1"/>
    <meta:user-defined meta:name="Info 2"/>
    <meta:user-defined meta:name="Info 3"/>
    <meta:user-defined meta:name="Info 4"/>
  </office:meta>
</office:document-meta>
</file>