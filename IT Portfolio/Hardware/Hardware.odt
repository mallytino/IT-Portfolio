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Text_20_body" style:list-style-name="L1"/>
    <style:style style:name="T1"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dware</text:p>
      <text:p text:style-name="Standard"><text:span text:style-name="Strong_20_Emphasis"><text:span text:style-name="T1"/></text:span></text:p>
      <text:list xml:id="list4769883400424059967" text:style-name="L1">
        <text:list-item>
          <text:p text:style-name="P2"><text:span text:style-name="Strong_20_Emphasis">CPU (Central Processing Unit):</text:span><text:line-break/>The CPU is the processor and is often referred to as the brain of the computer. It executes instructions, performs calculations and processes data required for programs and the operating system to run.</text:p>
        </text:list-item>
        <text:list-item>
          <text:p text:style-name="P2"><text:span text:style-name="Strong_20_Emphasis">RAM (Random Access Memory):</text:span><text:line-break/>RAM is temporary memory used to store data and programs that are currently in use. It allows applications and the operating system to access information quickly while the computer is running.</text:p>
        </text:list-item>
        <text:list-item>
          <text:p text:style-name="P2"><text:span text:style-name="Strong_20_Emphasis">SSD (Solid State Drive):</text:span><text:line-break/>An SSD is a storage device that permanently stores the operating system, applications and user files. SSDs are significantly faster, more reliable and more energy efficient than traditional hard disk drives (HDDs).</text:p>
        </text:list-item>
        <text:list-item>
          <text:p text:style-name="P2"><text:span text:style-name="Strong_20_Emphasis">CAT5e and CAT6:</text:span><text:line-break/>CAT5e and CAT6 are Ethernet cables used for wired network connections. CAT6 supports higher speeds, greater bandwidth and improved performance over longer distances compared to CAT5e</text:p>
        </text:list-item>
        <text:list-item>
          <text:p text:style-name="P2"><text:span text:style-name="Strong_20_Emphasis">HDMI (High-Definition Multimedia Interface):</text:span><text:line-break/>HDMI is a cable and connection standard used to transmit both video and audio between devices such as computers, monitors, televisions and gaming consoles.</text:p>
        </text:list-item>
        <text:list-item>
          <text:p text:style-name="P2"><text:span text:style-name="Strong_20_Emphasis">DisplayPort:</text:span><text:line-break/>DisplayPort is a digital display interface commonly used to connect computers to monitors. It supports high resolutions, high refresh rates and multiple monitor configurations.</text:p>
        </text:list-item>
        <text:list-item>
          <text:p text:style-name="P2"><text:span text:style-name="Strong_20_Emphasis">USB-A:</text:span><text:line-break/>USB-A is the traditional rectangular USB connector commonly used for devices such as keyboards, mice, printers, flash drives and external peripherals</text:p>
        </text:list-item>
        <text:list-item>
          <text:p text:style-name="P2"><text:span text:style-name="Strong_20_Emphasis">USB-C:</text:span><text:line-break/>USB-C is a modern, reversible USB connector that supports high-speed data transfer, video output and power delivery for charging devices such as laptops, smartphones and tablets.</text:p>
        </text:list-item>
      </text:list>
      <text:p text:style-name="Text_20_body"><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9H34M4S</meta:editing-duration>
    <meta:editing-cycles>5</meta:editing-cycles>
    <meta:generator>OpenOffice/4.1.12$Win32 OpenOffice.org_project/4112m1$Build-9809</meta:generator>
    <dc:date>2026-07-15T11:07:12.89</dc:date>
    <dc:creator>david chipere</dc:creator>
    <meta:document-statistic meta:table-count="0" meta:image-count="0" meta:object-count="0" meta:page-count="1" meta:paragraph-count="9" meta:word-count="248" meta:character-count="1642"/>
    <meta:user-defined meta:name="Info 1"/>
    <meta:user-defined meta:name="Info 2"/>
    <meta:user-defined meta:name="Info 3"/>
    <meta:user-defined meta:name="Info 4"/>
  </office:meta>
</office:document-meta>
</file>