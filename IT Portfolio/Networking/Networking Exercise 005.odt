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82EE27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cm" svg:y="-2cm" svg:width="16.999cm" svg:height="9.56cm" draw:z-index="0"><draw:image xlink:href="Pictures/10000201000007800000043882EE27E6.png" xlink:type="simple" xlink:show="embed" xlink:actuate="onLoad"/></draw:frame>Networking Exercise 005 -Tracert </text:p>
      <text:p text:style-name="P1"/>
      <text:list xml:id="list7573005437334673301" text:style-name="L1">
        <text:list-item>
          <text:p text:style-name="P4"><text:span text:style-name="T2">Tracert:</text:span><text:span text:style-name="T1">shows the path data takes to reach website for example laptop-&gt;router-&gt;internet provider-&gt;Another network-&gt;google its helps find out where the lag might be during the process</text:span></text:p>
        </text:list-item>
        <text:list-item>
          <text:p text:style-name="P4"><text:span text:style-name="T2">Hops: </text:span><text:span text:style-name="T1">are like stops your device takes for data to reach its path a website </text:span></text:p>
        </text:list-item>
        <text:list-item>
          <text:p text:style-name="P5">Command line:<text:span text:style-name="T1">tracert google.com</text:span></text:p>
        </text:list-item>
      </text:list>
      <text:p text:style-name="P2"/>
      <text:p text:style-name="P3">Results:<text:span text:style-name="T1">lots of hops differrent speeds for each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4H23M51S</meta:editing-duration>
    <meta:editing-cycles>7</meta:editing-cycles>
    <meta:generator>OpenOffice/4.1.12$Win32 OpenOffice.org_project/4112m1$Build-9809</meta:generator>
    <dc:date>2026-07-16T09:05:23.96</dc:date>
    <dc:creator>david chipere</dc:creator>
    <meta:document-statistic meta:table-count="0" meta:image-count="1" meta:object-count="0" meta:page-count="1" meta:paragraph-count="5" meta:word-count="57" meta:character-count="375"/>
    <meta:user-defined meta:name="Info 1"/>
    <meta:user-defined meta:name="Info 2"/>
    <meta:user-defined meta:name="Info 3"/>
    <meta:user-defined meta:name="Info 4"/>
  </office:meta>
</office:document-meta>
</file>