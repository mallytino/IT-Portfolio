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ing Exercise 006 -Router, WI-FI, VPN </text:p>
      <text:p text:style-name="P1"/>
      <text:list xml:id="list2653406608893593947" text:style-name="L1">
        <text:list-item>
          <text:p text:style-name="P2"><text:span text:style-name="T1">Wi-Fi:</text:span><text:span text:style-name="T2">is a wireless connection that allows your device to connct to a network </text:span></text:p>
        </text:list-item>
        <text:list-item>
          <text:p text:style-name="P3"><text:span text:style-name="T3">Router:</text:span><text:span text:style-name="T2">connects devices on a network and allows them to reach the internt</text:span></text:p>
        </text:list-item>
        <text:list-item>
          <text:p text:style-name="P3"><text:span text:style-name="T3">VPN:</text:span><text:span text:style-name="T2"> Creates a secure connection to a company's network over the internet when working remotely to access company files </text:span></text:p>
        </text:list-item>
      </text:list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4H35M22S</meta:editing-duration>
    <meta:editing-cycles>3</meta:editing-cycles>
    <meta:generator>OpenOffice/4.1.12$Win32 OpenOffice.org_project/4112m1$Build-9809</meta:generator>
    <dc:date>2026-06-22T14:15:19.73</dc:date>
    <meta:document-statistic meta:table-count="0" meta:image-count="0" meta:object-count="0" meta:page-count="1" meta:paragraph-count="4" meta:word-count="53" meta:character-count="321"/>
    <dc:creator>david chipere</dc:creator>
    <meta:user-defined meta:name="Info 1"/>
    <meta:user-defined meta:name="Info 2"/>
    <meta:user-defined meta:name="Info 3"/>
    <meta:user-defined meta:name="Info 4"/>
  </office:meta>
</office:document-meta>
</file>