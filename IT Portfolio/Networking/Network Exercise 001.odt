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EA26532C.png"/>
  <manifest:file-entry manifest:media-type="image/png" manifest:full-path="Pictures/10000201000000250000002BEEAF1499.png"/>
  <manifest:file-entry manifest:media-type="image/png" manifest:full-path="Pictures/100002010000060000000360FD03A9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top="0cm" fo:margin-bottom="0cm"/>
      <style:text-properties fo:font-size="18pt" style:font-size-asian="18pt" style:font-size-complex="18pt"/>
    </style:style>
    <style:style style:name="P4" style:family="paragraph" style:parent-style-name="Text_20_body">
      <style:paragraph-properties fo:margin-top="0cm" fo:margin-bottom="0cm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9" style:family="paragraph" style:parent-style-name="Text_20_body" style:list-style-name="L1">
      <style:paragraph-properties fo:margin-top="0cm" fo:margin-bottom="0cm"/>
      <style:text-properties fo:font-weight="bold" style:font-weight-asian="bold" style:font-weight-complex="bold"/>
    </style:style>
    <style:style style:name="P20" style:family="paragraph" style:parent-style-name="Text_20_body" style:list-style-name="L2">
      <style:paragraph-properties fo:margin-top="0cm" fo:margin-bottom="0cm"/>
      <style:text-properties fo:font-weight="bold" style:font-weight-asian="bold" style:font-weight-complex="bold"/>
    </style:style>
    <style:style style:name="P21" style:family="paragraph" style:parent-style-name="Text_20_body" style:list-style-name="L2">
      <style:paragraph-properties fo:margin-top="0cm" fo:margin-bottom="0cm"/>
      <style:text-properties fo:font-weight="normal" style:font-weight-asian="normal" style:font-weight-complex="normal"/>
    </style:style>
    <style:style style:name="P22" style:family="paragraph" style:parent-style-name="Text_20_body" style:list-style-name="L2">
      <style:paragraph-properties fo:margin-top="0cm" fo:margin-bottom="0cm"/>
    </style:style>
    <style:style style:name="P23" style:family="paragraph" style:parent-style-name="Text_20_body" style:list-style-name="L6">
      <style:paragraph-properties fo:margin-top="0cm" fo:margin-bottom="0cm"/>
    </style:style>
    <style:style style:name="P24" style:family="paragraph" style:parent-style-name="Text_20_body" style:list-style-name="L7">
      <style:paragraph-properties fo:margin-top="0cm" fo:margin-bottom="0cm"/>
    </style:style>
    <style:style style:name="P25" style:family="paragraph" style:parent-style-name="Text_20_body" style:list-style-name="L8">
      <style:paragraph-properties fo:margin-top="0cm" fo:margin-bottom="0cm"/>
    </style:style>
    <style:style style:name="P26" style:family="paragraph" style:parent-style-name="Preformatted_20_Text">
      <style:paragraph-properties fo:margin-top="0cm" fo:margin-bottom="0.499cm"/>
    </style:style>
    <style:style style:name="P27" style:family="paragraph" style:parent-style-name="Preformatted_20_Text" style:list-style-name="L9">
      <style:paragraph-properties fo:margin-top="0cm" fo:margin-bottom="0.499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/>
    </style:style>
    <style:style style:name="T5" style:family="text">
      <style:text-properties style:font-name="Times New Roma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tworking Exercise 001 - IP Address</text:p>
      <text:p text:style-name="P6"><text:span text:style-name="T1"/></text:p>
      <text:list xml:id="list7252115237190507567" text:style-name="L9">
        <text:list-item>
          <text:p text:style-name="P13"><text:span text:style-name="Strong_20_Emphasis">IP Address:</text:span>An IP address is a unique address assigned to a device on a network. It allows devices such as computers, phones and printers to identify and communicate with each other.If a device does not have a valid IP address, it may not be able to communicate on the network.</text:p>
        </text:list-item>
        <text:list-item>
          <text:p text:style-name="P13"><text:span text:style-name="Strong_20_Emphasis">IPv4 Address:</text:span>IPv4 is the most common version of IP addressing and consists of four numbers separated by periods, for example:</text:p>
          <text:p text:style-name="P27"><text:span text:style-name="Source_20_Text"><text:span text:style-name="T4">192.168.1.100</text:span></text:span></text:p>
        </text:list-item>
      </text:list>
      <text:p text:style-name="Text_20_body">On a home network, your laptop is typically assigned a private IPv4 address by the router using DHCP.</text:p>
      <text:list xml:id="list6377665262484987683" text:style-name="L10">
        <text:list-item>
          <text:p text:style-name="P14"><text:span text:style-name="Strong_20_Emphasis">Default Gateway:</text:span>The default gateway is usually the router on a local network. It acts as the path that allows devices on the network to communicate with devices outside the local network, including the internet.</text:p>
        </text:list-item>
        <text:list-item>
          <text:p text:style-name="P14"><text:span text:style-name="Strong_20_Emphasis">Public Network:</text:span><text:line-break/>A public network is a network that is open to the public, such as those found in:</text:p>
        </text:list-item>
      </text:list>
      <text:list xml:id="list5972265543853371939" text:style-name="L6">
        <text:list-item>
          <text:p text:style-name="P23">Hotels </text:p>
        </text:list-item>
        <text:list-item>
          <text:p text:style-name="P23">Airports </text:p>
        </text:list-item>
        <text:list-item>
          <text:p text:style-name="P23">Cafés </text:p>
        </text:list-item>
        <text:list-item>
          <text:p text:style-name="P10">Libraries </text:p>
        </text:list-item>
      </text:list>
      <text:p text:style-name="Text_20_body">Because public networks are shared by many users, they are generally considered less secure than private networks.</text:p>
      <text:list xml:id="list5527254325909018659" text:style-name="L11">
        <text:list-item>
          <text:p text:style-name="P15"><text:span text:style-name="Strong_20_Emphasis">Private Network:</text:span>A private network is a trusted network, such as a home or business network. Devices can communicate with each other more easily and additional sharing features are often enabled.Private IP addresses are not directly accessible from the internet.</text:p>
        </text:list-item>
      </text:list>
      <text:p text:style-name="Text_20_body">Examples:</text:p>
      <text:p text:style-name="Preformatted_20_Text"><text:span text:style-name="Source_20_Text"><text:span text:style-name="T5">192.168.x.x</text:span></text:span></text:p>
      <text:p text:style-name="Preformatted_20_Text"><text:span text:style-name="Source_20_Text"><text:span text:style-name="T5">10.x.x.x</text:span></text:span></text:p>
      <text:p text:style-name="P26"><text:span text:style-name="Source_20_Text"><text:span text:style-name="T5">172.16.x.x – 172.31.x.x</text:span></text:span></text:p>
      <text:list xml:id="list433571313883714822" text:style-name="L12">
        <text:list-item>
          <text:p text:style-name="P16"><text:span text:style-name="Strong_20_Emphasis">LAN (Local Area Network):</text:span>A LAN is a network that covers a small geographic area, such as:</text:p>
        </text:list-item>
      </text:list>
      <text:list xml:id="list8132630966576153949" text:style-name="L7">
        <text:list-item>
          <text:p text:style-name="P24">Home network </text:p>
        </text:list-item>
        <text:list-item>
          <text:p text:style-name="P24">Office network </text:p>
        </text:list-item>
        <text:list-item>
          <text:p text:style-name="P11">School network </text:p>
        </text:list-item>
      </text:list>
      <text:p text:style-name="Text_20_body">Devices on the LAN can communicate directly with one another.</text:p>
      <text:p text:style-name="Text_20_body"><text:span text:style-name="Strong_20_Emphasis"/></text:p>
      <text:list xml:id="list5706471615463225165" text:style-name="L13">
        <text:list-item>
          <text:p text:style-name="P17"><text:span text:style-name="Strong_20_Emphasis">WAN (Wide Area Network):</text:span>A WAN is a network that covers a much larger geographic area and connects multiple LANs together.</text:p>
        </text:list-item>
      </text:list>
      <text:p text:style-name="Text_20_body">Examples:</text:p>
      <text:list xml:id="list3472543697508977995" text:style-name="L8">
        <text:list-item>
          <text:p text:style-name="P25">A company with offices across the UK </text:p>
        </text:list-item>
        <text:list-item>
          <text:p text:style-name="P12">The internet</text:p>
        </text:list-item>
      </text:list>
      <text:p text:style-name="P5"><text:span text:style-name="T1"/></text:p>
      <text:p text:style-name="Text_20_body"><text:span text:style-name="T2">Objective:</text:span><text:line-break/><text:soft-page-break/>Check whether my laptop has successfully joined my home network.</text:p>
      <text:p text:style-name="Text_20_body">Command Used: using command prompt cmd</text:p>
      <text:p text:style-name="Text_20_body"><text:line-break/><text:span text:style-name="T2">ipconfig</text:span></text:p>
      <text:p text:style-name="Text_20_body">What I observed:</text:p>
      <text:list xml:id="list7019414406152208546" text:style-name="L3">
        <text:list-item>
          <text:p text:style-name="P7">My laptop has an IPv4 address.</text:p>
        </text:list-item>
        <text:list-item>
          <text:p text:style-name="P7">My laptop has a Default Gateway.</text:p>
        </text:list-item>
      </text:list>
      <text:p text:style-name="Text_20_body">What I learned:</text:p>
      <text:list xml:id="list2679448154818044831" text:style-name="L4">
        <text:list-item>
          <text:p text:style-name="P8">An IP address is my laptop's address on the network.</text:p>
        </text:list-item>
        <text:list-item>
          <text:p text:style-name="P8">The router usually gives my laptop an IP address.</text:p>
        </text:list-item>
        <text:list-item>
          <text:p text:style-name="P8">The Default Gateway is usually my router.</text:p>
        </text:list-item>
      </text:list>
      <text:p text:style-name="Text_20_body">Skills demonstrated:</text:p>
      <text:list xml:id="list1311175478977531359" text:style-name="L5">
        <text:list-item>
          <text:p text:style-name="P9">Networking fundamentals</text:p>
        </text:list-item>
        <text:list-item>
          <text:p text:style-name="P9">Command Prompt usage</text:p>
        </text:list-item>
        <text:list-item>
          <text:p text:style-name="P9">Basic troubleshooting</text:p>
        </text:list-item>
      </text:list>
      <text:list xml:id="list7453753886184743881" text:style-name="L2">
        <text:list-header>
          <text:p text:style-name="P21"/>
        </text:list-header>
      </text:list>
      <text:p text:style-name="P5"><draw:frame draw:style-name="fr1" draw:name="graphics2" text:anchor-type="paragraph" svg:width="0.979cm" svg:height="1.138cm" draw:z-index="1"><draw:image xlink:href="Pictures/10000201000000250000002BEEAF1499.png" xlink:type="simple" xlink:show="embed" xlink:actuate="onLoad"/></draw:frame><draw:frame draw:style-name="fr2" draw:name="graphics1" text:anchor-type="paragraph" svg:x="0.979cm" svg:y="0.206cm" svg:width="14.988cm" svg:height="7.421cm" draw:z-index="0"><draw:image xlink:href="Pictures/100002010000060000000360FD03A929.png" xlink:type="simple" xlink:show="embed" xlink:actuate="onLoad"/></draw:frame></text:p>
      <text:p text:style-name="P5"/>
      <text:p text:style-name="P5"/>
      <text:p text:style-name="P3"><text:span text:style-name="T2">Invistgation </text:span><text:span text:style-name="T2">and testing</text:span></text:p>
      <text:p text:style-name="P2"><draw:frame draw:style-name="fr3" draw:name="graphics3" text:anchor-type="paragraph" svg:width="17cm" svg:height="9.562cm" draw:z-index="2"><draw:image xlink:href="Pictures/100000000000078000000438EA26532C.png" xlink:type="simple" xlink:show="embed" xlink:actuate="onLoad"/></draw:frame><text:soft-page-break/>when you turn wifi off you cannnot see the ip adress </text:p>
      <text:list xml:id="list29413458" text:continue-numbering="true" text:style-name="L2">
        <text:list-item>
          <text:p text:style-name="P2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6-13T16:37:29.36</meta:creation-date>
    <meta:editing-duration>PT2H35M2S</meta:editing-duration>
    <meta:editing-cycles>7</meta:editing-cycles>
    <meta:generator>OpenOffice/4.1.12$Win32 OpenOffice.org_project/4112m1$Build-9809</meta:generator>
    <meta:initial-creator>david chipere</meta:initial-creator>
    <dc:date>2026-07-16T09:15:18.03</dc:date>
    <dc:creator>david chipere</dc:creator>
    <meta:document-statistic meta:table-count="0" meta:image-count="3" meta:object-count="0" meta:page-count="3" meta:paragraph-count="42" meta:word-count="383" meta:character-count="2234"/>
  </office:meta>
</office:document-meta>
</file>