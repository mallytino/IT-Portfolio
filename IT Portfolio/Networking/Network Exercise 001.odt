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EA26532C.png"/>
  <manifest:file-entry manifest:media-type="image/png" manifest:full-path="Pictures/10000201000000250000002BEEAF1499.png"/>
  <manifest:file-entry manifest:media-type="image/png" manifest:full-path="Pictures/100002010000060000000360FD03A9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/>
      <style:text-properties fo:font-size="18pt" style:font-size-asian="18pt" style:font-size-complex="18pt"/>
    </style:style>
    <style:style style:name="P4" style:family="paragraph" style:parent-style-name="Text_20_body">
      <style:paragraph-properties fo:margin-top="0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1">
      <style:paragraph-properties fo:margin-top="0cm" fo:margin-bottom="0cm"/>
      <style:text-properties fo:font-weight="bold" style:font-weight-asian="bold" style:font-weight-complex="bold"/>
    </style:style>
    <style:style style:name="P11" style:family="paragraph" style:parent-style-name="Text_20_body" style:list-style-name="L2">
      <style:paragraph-properties fo:margin-top="0cm" fo:margin-bottom="0cm"/>
      <style:text-properties fo:font-weight="bold" style:font-weight-asian="bold" style:font-weight-complex="bold"/>
    </style:style>
    <style:style style:name="P12" style:family="paragraph" style:parent-style-name="Text_20_body" style:list-style-name="L2">
      <style:paragraph-properties fo:margin-top="0cm" fo:margin-bottom="0cm"/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Exercise 001 - IP Address</text:p>
      <text:p text:style-name="P1"/>
      <text:list xml:id="list787327707800344016" text:style-name="L1">
        <text:list-item>
          <text:p text:style-name="P9"><text:span text:style-name="T2">IP Address: </text:span><text:span text:style-name="T1">an IP adress is an adress for device a computer a phone any device on a network <text:s/>it allows devices to idenify and communicate with each other and ip adresses are usaully different <text:s/>so the network knows which specifiic device it needs to send information oif there is no ip adress on the device its probaly not connected to the network </text:span></text:p>
        </text:list-item>
        <text:list-item>
          <text:p text:style-name="P10">IPv4 Address: <text:span text:style-name="T1">Is my IP adesss on my laptop on this network</text:span></text:p>
        </text:list-item>
        <text:list-item>
          <text:p text:style-name="P10">Default Gateway:<text:span text:style-name="T1">default gateway is my router it gives my laptop a gateway too reach the internet</text:span></text:p>
        </text:list-item>
      </text:list>
      <text:list xml:id="list723587793639325637" text:style-name="L2">
        <text:list-header>
          <text:p text:style-name="P11">Public Network: <text:span text:style-name="T1">is a unsecure network they open to anyone they are usally found in mobile providers or public spaces like hotels, resturants and libaries ip adress can be seen</text:span></text:p>
        </text:list-header>
        <text:list-item>
          <text:p text:style-name="P11">privtate network<text:span text:style-name="T1">; is usally your local home network but they ip adress Is usally hidden on the internt</text:span></text:p>
        </text:list-item>
        <text:list-item>
          <text:p text:style-name="P11">LAN:<text:span text:style-name="T1">is local wired area network its usally an office or home network thay uses it </text:span></text:p>
        </text:list-item>
        <text:list-item>
          <text:p text:style-name="P11">WAN:<text:span text:style-name="T1">Is a wide area network covers a network from a larger geograpic area</text:span></text:p>
        </text:list-item>
      </text:list>
      <text:p text:style-name="Text_20_body"><text:span text:style-name="T2">Objective:</text:span><text:line-break/>Check whether my laptop has successfully joined my home network.</text:p>
      <text:p text:style-name="Text_20_body">Command Used: using command prompt cmd</text:p>
      <text:p text:style-name="Text_20_body"><text:line-break/><text:span text:style-name="T2">ipconfig</text:span></text:p>
      <text:p text:style-name="Text_20_body">What I observed:</text:p>
      <text:list xml:id="list2546512715102304546" text:style-name="L3">
        <text:list-item>
          <text:p text:style-name="P6">My laptop has an IPv4 address.</text:p>
        </text:list-item>
        <text:list-item>
          <text:p text:style-name="P6">My laptop has a Default Gateway.</text:p>
        </text:list-item>
      </text:list>
      <text:p text:style-name="Text_20_body">What I learned:</text:p>
      <text:list xml:id="list2599955180734765018" text:style-name="L4">
        <text:list-item>
          <text:p text:style-name="P7">An IP address is my laptop's address on the network.</text:p>
        </text:list-item>
        <text:list-item>
          <text:p text:style-name="P7">The router usually gives my laptop an IP address.</text:p>
        </text:list-item>
        <text:list-item>
          <text:p text:style-name="P7">The Default Gateway is usually my router.</text:p>
        </text:list-item>
      </text:list>
      <text:p text:style-name="Text_20_body">Skills demonstrated:</text:p>
      <text:list xml:id="list274974328298980854" text:style-name="L5">
        <text:list-item>
          <text:p text:style-name="P8">Networking fundamentals</text:p>
        </text:list-item>
        <text:list-item>
          <text:p text:style-name="P8">Command Prompt usage</text:p>
        </text:list-item>
        <text:list-item>
          <text:p text:style-name="P8">Basic troubleshooting</text:p>
        </text:list-item>
      </text:list>
      <text:list xml:id="list27572983" text:continue-list="list723587793639325637" text:style-name="L2">
        <text:list-header>
          <text:p text:style-name="P12"/>
        </text:list-header>
      </text:list>
      <text:p text:style-name="P5"><draw:frame draw:style-name="fr1" draw:name="graphics2" text:anchor-type="paragraph" svg:width="0.979cm" svg:height="1.138cm" draw:z-index="1"><draw:image xlink:href="Pictures/10000201000000250000002BEEAF1499.png" xlink:type="simple" xlink:show="embed" xlink:actuate="onLoad"/></draw:frame><draw:frame draw:style-name="fr2" draw:name="graphics1" text:anchor-type="paragraph" svg:x="0.979cm" svg:y="0.206cm" svg:width="14.988cm" svg:height="7.421cm" draw:z-index="0"><draw:image xlink:href="Pictures/100002010000060000000360FD03A929.png" xlink:type="simple" xlink:show="embed" xlink:actuate="onLoad"/></draw:frame><text:soft-page-break/></text:p>
      <text:p text:style-name="P5"/>
      <text:p text:style-name="P5"/>
      <text:p text:style-name="P3"><text:span text:style-name="T2">Invistgation </text:span><text:span text:style-name="T2">and testing</text:span></text:p>
      <text:p text:style-name="P2"><draw:frame draw:style-name="fr3" draw:name="graphics3" text:anchor-type="paragraph" svg:width="17cm" svg:height="9.562cm" draw:z-index="2"><draw:image xlink:href="Pictures/100000000000078000000438EA26532C.png" xlink:type="simple" xlink:show="embed" xlink:actuate="onLoad"/></draw:frame>when you turn wifi off you cannnot see the ip adress </text:p>
      <text:list xml:id="list27567789" text:continue-numbering="true" text:style-name="L2">
        <text:list-item>
          <text:p text:style-name="P1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3T16:37:29.36</meta:creation-date>
    <meta:editing-duration>PT2H23M45S</meta:editing-duration>
    <meta:editing-cycles>6</meta:editing-cycles>
    <meta:generator>OpenOffice/4.1.12$Win32 OpenOffice.org_project/4112m1$Build-9809</meta:generator>
    <meta:initial-creator>david chipere</meta:initial-creator>
    <dc:date>2026-07-04T07:29:54.80</dc:date>
    <dc:creator>david chipere</dc:creator>
    <meta:document-statistic meta:table-count="0" meta:image-count="3" meta:object-count="0" meta:page-count="2" meta:paragraph-count="24" meta:word-count="273" meta:character-count="1504"/>
  </office:meta>
</office:document-meta>
</file>