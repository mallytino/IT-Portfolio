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4C000002CCCA638E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top="0cm" fo:margin-bottom="0cm"/>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style style:name="P6" style:family="paragraph" style:parent-style-name="Standard" style:list-style-name="L2">
      <style:text-properties fo:font-weight="bold" style:font-weight-asian="bold" style:font-weight-complex="bold"/>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3">
      <style:paragraph-properties fo:margin-top="0cm" fo:margin-bottom="0cm"/>
    </style:style>
    <style:style style:name="P11" style:family="paragraph" style:parent-style-name="Text_20_body" style:list-style-name="L4">
      <style:paragraph-properties fo:margin-top="0cm" fo:margin-bottom="0cm"/>
    </style:style>
    <style:style style:name="P12" style:family="paragraph" style:parent-style-name="Text_20_body" style:list-style-name="L5">
      <style:paragraph-properties fo:margin-top="0cm" fo:margin-bottom="0cm"/>
    </style:style>
    <style:style style:name="P13"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tworking Exercise 003-DNS</text:p>
      <text:p text:style-name="P3"/>
      <text:list xml:id="list6116624081492140390" text:style-name="L1">
        <text:list-item>
          <text:p text:style-name="P5"><text:span text:style-name="T2">DNS:</text:span><text:span text:style-name="T3">Converts Websites names into IP address because of this your device knows where to go and can commuicate with the website. The reason why its conveted into plain text for example google.com is because humans can't remember numbers very well but computers can because computers can only read numbers and communicate with webistes using ip adresses. DNS basically translates website names properly into their IP adress if website names weren't converted properly this is will lead too a internet connection problem.DNS bascially tells your computer a website adress in a way it understands IP address it like finding an address without it your computer will not find the address.DNS server is usally in your routwe</text:span></text:p>
        </text:list-item>
      </text:list>
      <text:list xml:id="list3759914427263346713" text:style-name="L2">
        <text:list-item>
          <text:p text:style-name="P6"><text:span text:style-name="T4">nslookup: </text:span><text:span text:style-name="T3">a command prompt lets us know IP adress of a webiste </text:span></text:p>
        </text:list-item>
      </text:list>
      <text:p text:style-name="P4"/>
      <text:p text:style-name="P1"><text:span text:style-name="Strong_20_Emphasis"><text:span text:style-name="T4">Objective:</text:span></text:span></text:p>
      <text:p text:style-name="Text_20_body">Check whether my laptop can translate a website name into an IP address.</text:p>
      <text:p text:style-name="Text_20_body"><text:span text:style-name="Strong_20_Emphasis">Tools Used:</text:span></text:p>
      <text:list xml:id="list1469876035077619231" text:style-name="L3">
        <text:list-item>
          <text:p text:style-name="P10">Command Prompt (cmd) </text:p>
        </text:list-item>
        <text:list-item>
          <text:p text:style-name="P7">nslookup: checks whether DNS can successfully find the IP address of a website. </text:p>
        </text:list-item>
      </text:list>
      <text:p text:style-name="Text_20_body"><text:span text:style-name="Strong_20_Emphasis">Command Used:</text:span><text:span text:style-name="Strong_20_Emphasis"><text:span text:style-name="T1">nslookup</text:span></text:span></text:p>
      <text:p text:style-name="Text_20_body"><text:span text:style-name="Strong_20_Emphasis">What I observed:</text:span></text:p>
      <text:list xml:id="list2432315962238491045" text:style-name="L4">
        <text:list-item>
          <text:p text:style-name="P11">Google was successfully found. </text:p>
        </text:list-item>
        <text:list-item>
          <text:p text:style-name="P11">One or more IP addresses were displayed. </text:p>
        </text:list-item>
        <text:list-item>
          <text:p text:style-name="P8">I could see which server was being used. </text:p>
        </text:list-item>
      </text:list>
      <text:p text:style-name="Text_20_body"><text:span text:style-name="Strong_20_Emphasis">What I learned:</text:span></text:p>
      <text:list xml:id="list6856771306608781546" text:style-name="L5">
        <text:list-item>
          <text:p text:style-name="P12">DNS converts website names into IP addresses. </text:p>
        </text:list-item>
        <text:list-item>
          <text:p text:style-name="P12">Computers use IP addresses to locate websites. </text:p>
        </text:list-item>
        <text:list-item>
          <text:p text:style-name="P12">If DNS fails, websites may not load even if Wi-Fi is connected. nslookup can help investigate DNS problems. </text:p>
        </text:list-item>
        <text:list-item>
          <text:p text:style-name="P12">DNS asked my router to to help find googles address</text:p>
        </text:list-item>
        <text:list-item>
          <text:p text:style-name="P12">google has many servers many locations and data centres this most likey the IP address of servers nearest too my location gthis because many people use google they can't afford a <text:s/>seerver not working so they need mutiple servers to reduce the risk</text:p>
        </text:list-item>
      </text:list>
      <text:p text:style-name="Text_20_body"><text:span text:style-name="Strong_20_Emphasis">Skills demonstrated:</text:span></text:p>
      <text:list xml:id="list4274430130453114775" text:style-name="L6">
        <text:list-item>
          <text:p text:style-name="P13">Networking fundamentals </text:p>
        </text:list-item>
        <text:list-item>
          <text:p text:style-name="P13">Command Prompt usage </text:p>
        </text:list-item>
        <text:list-item>
          <text:p text:style-name="P13">Basic troubleshooting </text:p>
        </text:list-item>
        <text:list-item>
          <text:p text:style-name="P13">DNS investigation</text:p>
        </text:list-item>
      </text:list>
      <text:p text:style-name="P2"/>
      <text:list xml:id="list29303019" text:continue-numbering="true" text:style-name="L6">
        <text:list-header>
          <text:p text:style-name="P9"><draw:frame draw:style-name="fr1" draw:name="graphics1" text:anchor-type="paragraph" svg:width="16.251cm" svg:height="6.228cm" draw:z-index="0"><draw:image xlink:href="Pictures/100002010000074C000002CCCA638EA6.png" xlink:type="simple" xlink:show="embed" xlink:actuate="onLoad"/></draw:frame><text:soft-page-break/></text:p>
        </text:list-header>
      </text:list>
      <text:p text:style-name="Text_20_body"/>
      <text:p text:style-name="P4">C:\Users\tinoc&gt;nslookup google.com</text:p>
      <text:p text:style-name="P4">*** Default servers are not available</text:p>
      <text:p text:style-name="P4">Server: <text:s/>UnKnown</text:p>
      <text:p text:style-name="P4">Address: <text:s/>127.0.0.1</text:p>
      <text:p text:style-name="P4"/>
      <text:p text:style-name="P4">*** UnKnown can't find google.com: No response from server</text:p>
      <text:p text:style-name="P4"/>
      <text:p text:style-name="P4">C:\Users\tinoc&gt;DNS</text:p>
      <text:p text:style-name="P4"/>
      <text:p text:style-name="P4">Result; if internet is not connected too a router <text:s/>you computer cannot properly ask dns too find the IP address of google.com</text:p>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14H27M34S</meta:editing-duration>
    <meta:editing-cycles>6</meta:editing-cycles>
    <meta:generator>OpenOffice/4.1.12$Win32 OpenOffice.org_project/4112m1$Build-9809</meta:generator>
    <dc:date>2026-07-16T09:02:30.75</dc:date>
    <dc:creator>david chipere</dc:creator>
    <meta:document-statistic meta:table-count="0" meta:image-count="1" meta:object-count="0" meta:page-count="2" meta:paragraph-count="32" meta:word-count="345" meta:character-count="2093"/>
    <meta:user-defined meta:name="Info 1"/>
    <meta:user-defined meta:name="Info 2"/>
    <meta:user-defined meta:name="Info 3"/>
    <meta:user-defined meta:name="Info 4"/>
  </office:meta>
</office:document-meta>
</file>