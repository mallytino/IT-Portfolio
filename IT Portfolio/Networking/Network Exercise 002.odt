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17F33310.png"/>
  <manifest:file-entry manifest:media-type="image/png" manifest:full-path="Pictures/1000000000000780000004389F96D8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2" style:list-style-name="L5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Exercise 002 - Ping </text:p>
      <text:p text:style-name="P4"/>
      <text:p text:style-name="P1"><text:span text:style-name="T1">Ping: </text:span><text:span text:style-name="T2">tests weather my device can communicate with anothet computer, printer or a website </text:span></text:p>
      <text:p text:style-name="P2">Packets: <text:span text:style-name="T2">tiny pieces of information sent across a netwok</text:span></text:p>
      <text:p text:style-name="P2">Ms: <text:span text:style-name="T2">how fast the other device or website responded too your reply the smaller the number of ms the faster </text:span></text:p>
      <text:p text:style-name="P3"/>
      <text:p text:style-name="Text_20_body">Objective:<text:line-break/>Check whether my laptop can communicate with a website over the internet.</text:p>
      <text:p text:style-name="Text_20_body">Tools Used:</text:p>
      <text:list xml:id="list5460962726578218230" text:style-name="L1">
        <text:list-item>
          <text:p text:style-name="P7">Command Prompt (cmd)</text:p>
        </text:list-item>
        <text:list-item>
          <text:p text:style-name="P7">ping: tests and checks weather my device can communicate with another device on awebiste </text:p>
        </text:list-item>
      </text:list>
      <text:p text:style-name="Text_20_body">Command Used:<text:line-break/>ping google.com</text:p>
      <text:p text:style-name="Text_20_body">What I observed:</text:p>
      <text:list xml:id="list6547966207372418858" text:style-name="L2">
        <text:list-item>
          <text:p text:style-name="P8">Google responded to my request.</text:p>
        </text:list-item>
        <text:list-item>
          <text:p text:style-name="P8">I could see the time it took for the response to return (ms).</text:p>
        </text:list-item>
        <text:list-item>
          <text:p text:style-name="P8">I could see packets sent and packets received.</text:p>
        </text:list-item>
      </text:list>
      <text:p text:style-name="Text_20_body">What I learned:</text:p>
      <text:list xml:id="list5938868753159251053" text:style-name="L3">
        <text:list-item>
          <text:p text:style-name="P9">Ping tests whether my device can communicate with another device or website.</text:p>
        </text:list-item>
        <text:list-item>
          <text:p text:style-name="P9">A successful ping usually means I have an internet connection.</text:p>
        </text:list-item>
        <text:list-item>
          <text:p text:style-name="P9">Ping can help identify connectivity problems.</text:p>
        </text:list-item>
      </text:list>
      <text:p text:style-name="Text_20_body">Skills demonstrated:</text:p>
      <text:list xml:id="list7097747552001859884" text:style-name="L4">
        <text:list-item>
          <text:p text:style-name="P10">Networking fundamentals</text:p>
        </text:list-item>
        <text:list-item>
          <text:p text:style-name="P10">Command Prompt usage</text:p>
        </text:list-item>
        <text:list-item>
          <text:p text:style-name="P10">Basic troubleshooting</text:p>
        </text:list-item>
        <text:list-item>
          <text:p text:style-name="P10">Connectivity testing</text:p>
        </text:list-item>
      </text:list>
      <text:p text:style-name="Text_20_body"><draw:frame draw:style-name="fr1" draw:name="graphics2" text:anchor-type="paragraph" svg:width="17cm" svg:height="9.562cm" draw:z-index="0"><draw:image xlink:href="Pictures/10000000000007800000043817F33310.png" xlink:type="simple" xlink:show="embed" xlink:actuate="onLoad"/></draw:frame><text:soft-page-break/></text:p>
      <text:p text:style-name="Text_20_body"><text:span text:style-name="T1">Invistgation and testing</text:span> </text:p>
      <text:p text:style-name="Text_20_body"/>
      <text:p text:style-name="Text_20_body">Difffertnt websites usallly have the same number of packet but diferent speeds youtube is faster than google perhaps because google use fot infotmation </text:p>
      <text:list xml:id="list2703425954693583598" text:style-name="L5">
        <text:list-item>
          <text:h text:style-name="P6" text:outline-level="2"><text:span text:style-name="Source_20_Text"><text:span text:style-name="T3">ping -t google.com: </text:span></text:span><text:span text:style-name="T4">Continuously tests communication with a website until you stop it.</text:span><text:span text:style-name="Strong_20_Emphasis"><text:span text:style-name="T4"> I would use it </text:span></text:span><text:span text:style-name="T4">When a user says their internet keeps disconnecting.</text:span><text:span text:style-name="Strong_20_Emphasis"><text:span text:style-name="T4">so </text:span></text:span><text:span text:style-name="T4">If I see </text:span><text:span text:style-name="Source_20_Text"><text:span text:style-name="T4">Request timed out</text:span></text:span><text:span text:style-name="T4"> or very high </text:span><text:span text:style-name="Source_20_Text"><text:span text:style-name="T4">ms</text:span></text:span><text:span text:style-name="T4">, the connection may be unstable.</text:span></text:h>
        </text:list-item>
      </text:list>
      <text:p text:style-name="P5"><draw:frame draw:style-name="fr2" draw:name="graphics1" text:anchor-type="paragraph" svg:width="17cm" svg:height="9.562cm" draw:z-index="1"><draw:image xlink:href="Pictures/1000000000000780000004389F96D8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hipere</meta:initial-creator>
    <meta:creation-date>2026-06-15T10:58:08.82</meta:creation-date>
    <dc:date>2026-06-29T16:07:50.92</dc:date>
    <dc:creator>david chipere</dc:creator>
    <meta:editing-duration>P3DT7H12M46S</meta:editing-duration>
    <meta:editing-cycles>8</meta:editing-cycles>
    <meta:generator>OpenOffice/4.1.12$Win32 OpenOffice.org_project/4112m1$Build-9809</meta:generator>
    <meta:document-statistic meta:table-count="0" meta:image-count="2" meta:object-count="0" meta:page-count="2" meta:paragraph-count="25" meta:word-count="234" meta:character-count="1395"/>
  </office:meta>
</office:document-meta>
</file>