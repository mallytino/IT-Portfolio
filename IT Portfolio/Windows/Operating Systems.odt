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26pt" fo:font-weight="bold" style:font-size-asian="26pt" style:font-weight-asian="bold" style:font-size-complex="26pt" style:font-weight-complex="bold"/>
    </style:style>
    <style:style style:name="P2" style:family="paragraph" style:parent-style-name="Standard">
      <style:text-properties fo:font-size="22pt" fo:font-weight="normal" style:font-size-asian="22pt" style:font-weight-asian="normal" style:font-size-complex="22pt" style:font-weight-complex="normal"/>
    </style:style>
    <style:style style:name="P3" style:family="paragraph" style:parent-style-name="Standard" style:list-style-name="L1"/>
    <style:style style:name="P4" style:family="paragraph" style:parent-style-name="Standard" style:list-style-name="L1">
      <style:text-properties fo:font-weight="bold" style:font-weight-asian="bold" style:font-weight-complex="bold"/>
    </style:style>
    <style:style style:name="P5" style:family="paragraph" style:parent-style-name="Standard">
      <style:text-properties fo:font-size="22pt" fo:font-weight="normal" style:font-size-asian="22pt" style:font-weight-asian="normal" style:font-size-complex="22pt" style:font-weight-complex="normal"/>
    </style:style>
    <style:style style:name="P6" style:family="paragraph" style:parent-style-name="Standard" style:list-style-name="L1">
      <style:text-properties fo:font-size="22pt" fo:font-weight="normal" style:font-size-asian="22pt" style:font-weight-asian="normal" style:font-size-complex="22pt" style:font-weight-complex="normal"/>
    </style:style>
    <style:style style:name="P7" style:family="paragraph" style:parent-style-name="Standard">
      <style:text-properties fo:font-size="24pt" fo:font-weight="normal" style:font-size-asian="24pt" style:font-weight-asian="normal" style:font-size-complex="24pt" style:font-weight-complex="normal"/>
    </style:style>
    <style:style style:name="P8" style:family="paragraph" style:parent-style-name="Text_20_body" style:list-style-name="L2"/>
    <style:style style:name="P9" style:family="paragraph" style:parent-style-name="Text_20_body">
      <style:text-properties fo:font-size="24pt" style:font-size-asian="24pt" style:font-size-complex="24pt"/>
    </style:style>
    <style:style style:name="P10" style:family="paragraph" style:parent-style-name="Text_20_body" style:list-style-name="L2">
      <style:text-properties fo:font-size="24pt" style:font-size-asian="24pt" style:font-size-complex="24pt"/>
    </style:style>
    <style:style style:name="P11" style:family="paragraph" style:parent-style-name="Text_20_body" style:list-style-name="L3">
      <style:text-properties fo:font-size="24pt" style:font-size-asian="24pt" style:font-size-complex="24pt"/>
    </style:style>
    <style:style style:name="P12" style:family="paragraph" style:parent-style-name="Text_20_body" style:list-style-name="L4">
      <style:text-properties fo:font-size="24pt" style:font-size-asian="24pt" style:font-size-complex="24pt"/>
    </style:style>
    <style:style style:name="P13" style:family="paragraph" style:parent-style-name="Text_20_body" style:list-style-name="L5">
      <style:text-properties fo:font-size="24pt" style:font-size-asian="24pt" style:font-size-complex="24pt"/>
    </style:style>
    <style:style style:name="P14" style:family="paragraph" style:parent-style-name="Text_20_body" style:list-style-name="L6">
      <style:text-properties fo:font-size="24pt" style:font-size-asian="24pt" style:font-size-complex="24pt"/>
    </style:style>
    <style:style style:name="P15" style:family="paragraph" style:parent-style-name="Text_20_body" style:list-style-name="L7">
      <style:text-properties fo:font-size="24pt" style:font-size-asian="24pt" style:font-size-complex="24pt"/>
    </style:style>
    <style:style style:name="P16" style:family="paragraph" style:parent-style-name="Text_20_body" style:list-style-name="L8"/>
    <style:style style:name="P17" style:family="paragraph" style:parent-style-name="Text_20_body" style:list-style-name="L2">
      <style:paragraph-properties fo:margin-top="0cm" fo:margin-bottom="0cm"/>
      <style:text-properties fo:font-size="24pt" style:font-size-asian="24pt" style:font-size-complex="24pt"/>
    </style:style>
    <style:style style:name="P18" style:family="paragraph" style:parent-style-name="Text_20_body" style:list-style-name="L3">
      <style:paragraph-properties fo:margin-top="0cm" fo:margin-bottom="0cm"/>
      <style:text-properties fo:font-size="24pt" style:font-size-asian="24pt" style:font-size-complex="24pt"/>
    </style:style>
    <style:style style:name="P19" style:family="paragraph" style:parent-style-name="Text_20_body" style:list-style-name="L4">
      <style:paragraph-properties fo:margin-top="0cm" fo:margin-bottom="0cm"/>
      <style:text-properties fo:font-size="24pt" style:font-size-asian="24pt" style:font-size-complex="24pt"/>
    </style:style>
    <style:style style:name="P20" style:family="paragraph" style:parent-style-name="Text_20_body" style:list-style-name="L5">
      <style:paragraph-properties fo:margin-top="0cm" fo:margin-bottom="0cm"/>
      <style:text-properties fo:font-size="24pt" style:font-size-asian="24pt" style:font-size-complex="24pt"/>
    </style:style>
    <style:style style:name="P21" style:family="paragraph" style:parent-style-name="Text_20_body" style:list-style-name="L6">
      <style:paragraph-properties fo:margin-top="0cm" fo:margin-bottom="0cm"/>
      <style:text-properties fo:font-size="24pt" style:font-size-asian="24pt" style:font-size-complex="24pt"/>
    </style:style>
    <style:style style:name="P22" style:family="paragraph" style:parent-style-name="Text_20_body" style:list-style-name="L7">
      <style:paragraph-properties fo:margin-top="0cm" fo:margin-bottom="0cm"/>
      <style:text-properties fo:font-size="24pt" style:font-size-asian="24pt" style:font-size-complex="24pt"/>
    </style:style>
    <style:style style:name="P23" style:family="paragraph" style:parent-style-name="Heading_20_1" style:list-style-name="L2"/>
    <style:style style:name="P24" style:family="paragraph" style:parent-style-name="Horizontal_20_Line">
      <style:text-properties fo:font-size="24pt" style:font-size-asian="24pt" style:font-size-complex="24pt"/>
    </style:style>
    <style:style style:name="P25" style:family="paragraph" style:parent-style-name="Heading_20_3">
      <style:text-properties fo:font-size="24pt" style:font-size-asian="24pt" style:font-size-complex="24pt"/>
    </style:style>
    <style:style style:name="T1" style:family="text">
      <style:text-properties fo:font-size="22pt" style:font-size-asian="22pt" style:font-size-complex="22pt"/>
    </style:style>
    <style:style style:name="T2" style:family="text">
      <style:text-properties fo:font-size="22pt" fo:font-weight="bold" style:font-size-asian="22pt" style:font-weight-asian="bold" style:font-size-complex="22pt" style:font-weight-complex="bold"/>
    </style:style>
    <style:style style:name="T3" style:family="text">
      <style:text-properties fo:font-size="22pt" fo:font-weight="normal" style:font-size-asian="22pt" style:font-weight-asian="normal" style:font-size-complex="22pt" style:font-weight-complex="normal"/>
    </style:style>
    <style:style style:name="T4" style:family="text">
      <style:text-properties fo:font-weight="normal" style:font-weight-asian="normal" style:font-weight-complex="normal"/>
    </style:style>
    <style:style style:name="T5" style:family="text">
      <style:text-properties fo:font-size="24pt" style:font-size-asian="24pt" style:font-size-complex="24pt"/>
    </style:style>
    <style:style style:name="T6" style:family="text">
      <style:text-properties fo:font-size="24pt" fo:font-weight="normal" style:font-size-asian="24pt" style:font-weight-asian="normal" style:font-size-complex="24pt"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perating Systems 14/06/2025 </text:p>
      <text:p text:style-name="P2"><text:span text:style-name="T3"/></text:p>
      <text:list xml:id="list2353900125898607016" text:style-name="L8">
        <text:list-item>
          <text:p text:style-name="P16"><text:span text:style-name="Strong_20_Emphasis"><text:span text:style-name="T5">Windows 10 and Windows 11</text:span></text:span><text:span text:style-name="T5"> are desktop operating systems developed by Microsoft. They are widely used by businesses and home users to run applications, access files and manage hardware devices.</text:span></text:p>
        </text:list-item>
      </text:list>
      <text:p text:style-name="P9"/>
      <text:list xml:id="list28861395" text:continue-numbering="true" text:style-name="L8">
        <text:list-item>
          <text:p text:style-name="P16"><text:span text:style-name="Strong_20_Emphasis"><text:span text:style-name="T5">Windows Server</text:span></text:span><text:span text:style-name="T5"> is Microsoft's server operating system used by businesses to manage networks, users, devices, shared resources and services such as Active Directory, DNS and DHCP. It is designed for reliability, security and long-term support.</text:span></text:p>
        </text:list-item>
      </text:list>
      <text:p text:style-name="P9"/>
      <text:list xml:id="list28853990" text:continue-numbering="true" text:style-name="L8">
        <text:list-item>
          <text:p text:style-name="P16"><text:span text:style-name="Strong_20_Emphasis"><text:span text:style-name="T5">Linux</text:span></text:span><text:span text:style-name="T5"> is an open-source operating system commonly used on servers, cloud platforms and networking devices. Users can view, modify and distribute the source code. Popular distributions include Ubuntu, Debian, Red Hat and CentOS.</text:span></text:p>
        </text:list-item>
      </text:list>
      <text:p text:style-name="Text_20_body"><text:span text:style-name="Strong_20_Emphasis"><text:span text:style-name="T6">Why companies use Linux:</text:span></text:span></text:p>
      <text:list xml:id="list1255288095434554126" text:style-name="L2">
        <text:list-item>
          <text:p text:style-name="P17">Stable and reliable </text:p>
        </text:list-item>
        <text:list-item>
          <text:p text:style-name="P17">Highly secure </text:p>
        </text:list-item>
        <text:list-item>
          <text:p text:style-name="P17">Low hardware requirements </text:p>
        </text:list-item>
        <text:list-item>
          <text:p text:style-name="P10"><text:soft-page-break/>Widely used in cloud computing </text:p>
        </text:list-item>
      </text:list>
      <text:p text:style-name="P24"/>
      <text:list xml:id="list28836671" text:continue-numbering="true" text:style-name="L2">
        <text:list-item>
          <text:h text:style-name="P23" text:outline-level="1"><text:span text:style-name="Strong_20_Emphasis"><text:span text:style-name="T5">Android</text:span></text:span><text:span text:style-name="T5"> </text:span><text:span text:style-name="T6">is an open-source mobile operating system developed by Google and based on the Linux kernel. It is used on smartphones, tablets and other smart devices from manufacturers such as Samsung, Google and Xiaomi.</text:span></text:h>
        </text:list-item>
      </text:list>
      <text:p text:style-name="P9"><text:span text:style-name="T4"/></text:p>
      <text:list xml:id="list28846390" text:continue-numbering="true" text:style-name="L2">
        <text:list-item>
          <text:p text:style-name="P8"><text:span text:style-name="Strong_20_Emphasis"><text:span text:style-name="T5">ChromeOS</text:span></text:span><text:span text:style-name="T5"> is a lightweight operating system developed by Google and based on Linux. It is designed primarily for web browsing and cloud-based applications. It includes security features such as sandboxing and automatic updates.</text:span></text:p>
        </text:list-item>
        <text:list-item>
          <text:p text:style-name="P8"><text:span text:style-name="Strong_20_Emphasis"><text:span text:style-name="T5">macOS</text:span></text:span><text:span text:style-name="T5"> is Apple's desktop operating system used exclusively on Mac computers. It is based on Unix and is known for its security, stability and integration with Apple's ecosystem.</text:span></text:p>
        </text:list-item>
      </text:list>
      <text:p text:style-name="P9"/>
      <text:list xml:id="list28853053" text:continue-numbering="true" text:style-name="L2">
        <text:list-item>
          <text:p text:style-name="P8"><text:span text:style-name="Strong_20_Emphasis"><text:span text:style-name="T5">iOS</text:span></text:span><text:span text:style-name="T5"> is Apple's mobile operating system used on iPhones.</text:span></text:p>
        </text:list-item>
      </text:list>
      <text:p text:style-name="Text_20_body"><text:soft-page-break/><text:span text:style-name="Strong_20_Emphasis"><text:span text:style-name="T5">iPadOS</text:span></text:span><text:span text:style-name="T5"> is Apple's operating system for iPads. It is based on iOS but includes additional multitasking and productivity features designed for larger screens.</text:span></text:p>
      <text:h text:style-name="Heading_20_1" text:outline-level="1"><text:span text:style-name="T5">File Systems:</text:span><text:span text:style-name="Strong_20_Emphasis"><text:span text:style-name="T6">A file system</text:span></text:span><text:span text:style-name="T6"> is the method an operating system uses to organise, store and retrieve data on storage devices such as SSDs, HDDs and USB drives.</text:span></text:h>
      <text:h text:style-name="P25" text:outline-level="3">NTFS (Windows)</text:h>
      <text:list xml:id="list8835377180343863921" text:style-name="L3">
        <text:list-item>
          <text:p text:style-name="P18">Default Windows file system </text:p>
        </text:list-item>
        <text:list-item>
          <text:p text:style-name="P18">Supports permissions and security </text:p>
        </text:list-item>
        <text:list-item>
          <text:p text:style-name="P18">Supports large files and volumes </text:p>
        </text:list-item>
        <text:list-item>
          <text:p text:style-name="P11">Includes journaling for reliability </text:p>
        </text:list-item>
      </text:list>
      <text:h text:style-name="P25" text:outline-level="3">FAT32</text:h>
      <text:list xml:id="list2501452505646378329" text:style-name="L4">
        <text:list-item>
          <text:p text:style-name="P19">Very widely compatible </text:p>
        </text:list-item>
        <text:list-item>
          <text:p text:style-name="P19">Works with most devices </text:p>
        </text:list-item>
        <text:list-item>
          <text:p text:style-name="P19">Maximum file size of 4 GB </text:p>
        </text:list-item>
        <text:list-item>
          <text:p text:style-name="P12">Common on older USB drives </text:p>
        </text:list-item>
      </text:list>
      <text:h text:style-name="P25" text:outline-level="3">exFAT</text:h>
      <text:list xml:id="list8348479683154528435" text:style-name="L5">
        <text:list-item>
          <text:p text:style-name="P20">Designed for flash drives and external storage </text:p>
        </text:list-item>
        <text:list-item>
          <text:p text:style-name="P20">Supports very large files </text:p>
        </text:list-item>
        <text:list-item>
          <text:p text:style-name="P20">Compatible with Windows and macOS </text:p>
        </text:list-item>
        <text:list-item>
          <text:p text:style-name="P13">No journaling support </text:p>
        </text:list-item>
      </text:list>
      <text:h text:style-name="P25" text:outline-level="3"><text:soft-page-break/>ext4 (Linux)</text:h>
      <text:list xml:id="list5476050208135482934" text:style-name="L6">
        <text:list-item>
          <text:p text:style-name="P21">Common Linux file system </text:p>
        </text:list-item>
        <text:list-item>
          <text:p text:style-name="P21">Reliable and efficient </text:p>
        </text:list-item>
        <text:list-item>
          <text:p text:style-name="P14">Supports large files and volumes </text:p>
        </text:list-item>
      </text:list>
      <text:h text:style-name="P25" text:outline-level="3">APFS (Apple File System)</text:h>
      <text:list xml:id="list5517747714743094598" text:style-name="L7">
        <text:list-item>
          <text:p text:style-name="P22">Modern Apple file system </text:p>
        </text:list-item>
        <text:list-item>
          <text:p text:style-name="P22">Optimised for SSDs </text:p>
        </text:list-item>
        <text:list-item>
          <text:p text:style-name="P22">Supports encryption and snapshots </text:p>
        </text:list-item>
        <text:list-item>
          <text:p text:style-name="P15">Used on macOS, iOS and iPadOS</text:p>
        </text:list-item>
      </text:list>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MS Gothic" style:font-size-asian="24pt" style:font-weight-asian="bold" style:font-name-complex="Tahoma" style:font-size-complex="24pt"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MS Gothic" style:font-size-asian="14pt" style:font-weight-asian="bold" style:font-name-complex="Tahoma" style:font-size-complex="14pt" style:font-weight-complex="bold"/>
    </style:style>
    <style:style style:name="Bullet_20_Symbols" style:display-name="Bullet Symbols" style:family="text">
      <style:text-properties style:font-name="OpenSymbol" fo:font-size="18pt" style:font-name-asian="OpenSymbol" style:font-size-asian="18pt" style:font-name-complex="OpenSymbol" style:font-size-complex="18pt"/>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4M38S</meta:editing-duration>
    <meta:editing-cycles>5</meta:editing-cycles>
    <meta:generator>OpenOffice/4.1.12$Win32 OpenOffice.org_project/4112m1$Build-9809</meta:generator>
    <dc:date>2026-07-16T08:57:08.98</dc:date>
    <dc:creator>david chipere</dc:creator>
    <meta:document-statistic meta:table-count="0" meta:image-count="0" meta:object-count="0" meta:page-count="4" meta:paragraph-count="39" meta:word-count="388" meta:character-count="2420"/>
    <meta:user-defined meta:name="Info 1"/>
    <meta:user-defined meta:name="Info 2"/>
    <meta:user-defined meta:name="Info 3"/>
    <meta:user-defined meta:name="Info 4"/>
  </office:meta>
</office:document-meta>
</file>