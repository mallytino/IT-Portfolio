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6pt" fo:font-weight="bold" style:font-size-asian="26pt" style:font-weight-asian="bold" style:font-size-complex="26pt" style:font-weight-complex="bold"/>
    </style:style>
    <style:style style:name="P2" style:family="paragraph" style:parent-style-name="Standard" style:list-style-name="L1"/>
    <style:style style:name="P3" style:family="paragraph" style:parent-style-name="Standard">
      <style:text-properties fo:font-size="22pt" fo:font-weight="normal" style:font-size-asian="22pt" style:font-weight-asian="normal" style:font-size-complex="22pt" style:font-weight-complex="normal"/>
    </style:style>
    <style:style style:name="P4" style:family="paragraph" style:parent-style-name="Standard" style:list-style-name="L1">
      <style:text-properties fo:font-size="22pt" fo:font-weight="normal" style:font-size-asian="22pt" style:font-weight-asian="normal" style:font-size-complex="22pt" style:font-weight-complex="normal"/>
    </style:style>
    <style:style style:name="P5" style:family="paragraph" style:parent-style-name="Standard" style:list-style-name="L1">
      <style:text-properties fo:font-weight="bold" style:font-weight-asian="bold" style:font-weight-complex="bold"/>
    </style:style>
    <style:style style:name="T1" style:family="text">
      <style:text-properties fo:font-size="22pt" style:font-size-asian="22pt" style:font-size-complex="22pt"/>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fo:font-weight="normal" style:font-size-asian="22pt" style:font-weight-asian="normal" style:font-size-complex="2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ing Systems 14/06/2025 </text:p>
      <text:p text:style-name="P1"/>
      <text:list xml:id="list6076188311556249054" text:style-name="L1">
        <text:list-item>
          <text:p text:style-name="P2"><text:span text:style-name="T2">Windows: </text:span><text:span text:style-name="T3">10,11, used as desktop operating system by the general public generaly 5 year life </text:span></text:p>
        </text:list-item>
      </text:list>
      <text:p text:style-name="P3"/>
      <text:list xml:id="list30417294" text:continue-numbering="true" text:style-name="L1">
        <text:list-item>
          <text:p text:style-name="P2"><text:span text:style-name="T2">Windows Server: </text:span><text:span text:style-name="T3">used by enterpise and buisnessess for larger data beetter depolyment for production and have longer life 10 years becasue they much harder and longer and to update </text:span></text:p>
        </text:list-item>
      </text:list>
      <text:p text:style-name="P3"/>
      <text:list xml:id="list30401803" text:continue-numbering="true" text:style-name="L1">
        <text:list-item>
          <text:p text:style-name="P5"><text:span text:style-name="T1">Linux: </text:span><text:span text:style-name="T3">is an open source operating system its generally server operating system it can be used desktop, cloud, android type software where useers can download modify, use and distribute the source code and there differnt distrubutions that offer code and you can receive support if do not knoow how to use linux ubuntu, its suitable for server enviorment because theres less requrment </text:span></text:p>
        </text:list-item>
      </text:list>
      <text:p text:style-name="P3"/>
      <text:list xml:id="list30415849" text:continue-numbering="true" text:style-name="L1">
        <text:list-item>
          <text:p text:style-name="P5"><text:span text:style-name="T1">Android: </text:span><text:span text:style-name="T3">is open source operarting system mainley for smartphones tablet except for apple and is based on linux and has shorter lifespan beacuase it doesnt have enough processing and storage and can be differnt depending the manfucfurer and thre requirments they want</text:span></text:p>
          <text:p text:style-name="P4"><text:s text:c="2"/></text:p>
        </text:list-item>
      </text:list>
      <text:p text:style-name="P3"/>
      <text:list xml:id="list30405245" text:continue-numbering="true" text:style-name="L1">
        <text:list-item>
          <text:p text:style-name="P5"><text:soft-page-break/><text:span text:style-name="T1">Chrome:</text:span><text:span text:style-name="T3">is a web centerded operating system too conncet web appillcation online on the internet very cheaply and be used very easily for everyone, its very secure built in firewalls virus protection and has sandbox which basiccaly means if computer is infected malicious conent only a spefic part operating system will be affected not the whole thing its very cloud based so everyting is faster is created by google based on linux its very stripped down operating system</text:span></text:p>
        </text:list-item>
      </text:list>
      <text:p text:style-name="P3"/>
      <text:list xml:id="list30392231" text:continue-numbering="true" text:style-name="L1">
        <text:list-item>
          <text:p text:style-name="P5"><text:span text:style-name="T1">MacOs: </text:span><text:span text:style-name="T3">is not open souce operating system it is suporrted and created by apple and used specifiaclly for apple computers is based Unix which means its linux based its propitery system </text:span></text:p>
        </text:list-item>
      </text:list>
      <text:p text:style-name="P3"/>
      <text:list xml:id="list30400039" text:continue-numbering="true" text:style-name="L1">
        <text:list-item>
          <text:p text:style-name="P5"><text:span text:style-name="T1">IOS, iPadOs:</text:span><text:span text:style-name="T3"> its a propitery ystem specificallly for apple phones and ipads and isn based on Unix.They differ becuase iPadOS Can actually do far more compared ios even though its less popular but they are very similar it can do far multitasking applictions </text:span></text:p>
          <text:p text:style-name="P4"/>
        </text:list-item>
        <text:list-item>
          <text:p text:style-name="P5"><text:span text:style-name="T1">File systems: </text:span><text:span text:style-name="T3">its the way data structured and organsised Windows, NTFS, FAT32, exFAT linux ext4 or exFat and MaxOS APFS, they most suitable for storage devices like ssds, flax drives and hard drive they enable smoother storage and </text:span><text:soft-page-break/><text:span text:style-name="T3">retrieveal of data NTFS is the default file system fir windows support large volume data secuuirty and journaling ReF is best for windows servers but its poor at file compression FAT32 is universal and compatible with most operarting but has limited volume not suitble for modern storage needs exFAT is mored advanced larger volume but weak in journaling APFS is suitable <text:s/>only for apple but much faster muvh more volume for data very secure and encryption </text:span></text:p>
        </text:list-item>
      </text:list>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fo:font-size="18pt" style:font-name-asian="OpenSymbol" style:font-size-asian="18pt" style:font-name-complex="OpenSymbol"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0S</meta:editing-duration>
    <meta:editing-cycles>4</meta:editing-cycles>
    <meta:generator>OpenOffice/4.1.12$Win32 OpenOffice.org_project/4112m1$Build-9809</meta:generator>
    <dc:date>2026-06-15T10:13:03.96</dc:date>
    <dc:creator>david chipere</dc:creator>
    <meta:document-statistic meta:table-count="0" meta:image-count="0" meta:object-count="0" meta:page-count="3" meta:paragraph-count="10" meta:word-count="425" meta:character-count="2562"/>
    <meta:user-defined meta:name="Info 1"/>
    <meta:user-defined meta:name="Info 2"/>
    <meta:user-defined meta:name="Info 3"/>
    <meta:user-defined meta:name="Info 4"/>
  </office:meta>
</office:document-meta>
</file>