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C000003945109895A.png"/>
  <manifest:file-entry manifest:media-type="image/png" manifest:full-path="Pictures/100000000000078000000438B2306509.png"/>
  <manifest:file-entry manifest:media-type="image/png" manifest:full-path="Pictures/1000000000000780000004381BCB1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2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cketing Systems</text:p>
      <text:p text:style-name="P1"/>
      <text:p text:style-name="P3">Ticketing systems:<text:span text:style-name="T2">is a software used to track, manage and reslove inquries compliants or techical issues for people working in IT Roles </text:span></text:p>
      <text:p text:style-name="P1"/>
      <text:p text:style-name="P1"/>
      <text:list xml:id="list5705799572359063625" text:style-name="L1">
        <text:list-item>
          <text:p text:style-name="P2"><text:span text:style-name="T1">Creating ticket using jira service management </text:span></text:p>
        </text:list-item>
      </text:list>
      <text:list xml:id="list3746445955887854202" text:style-name="L2">
        <text:list-item>
          <text:p text:style-name="P5"><draw:frame draw:style-name="fr1" draw:name="graphics1" text:anchor-type="paragraph" svg:width="16.999cm" svg:height="9.56cm" draw:z-index="0"><draw:image xlink:href="Pictures/100000000000078000000438B2306509.png" xlink:type="simple" xlink:show="embed" xlink:actuate="onLoad"/></draw:frame>adding notes</text:p>
          <text:p text:style-name="P4"><draw:frame draw:style-name="fr2" draw:name="graphics2" text:anchor-type="paragraph" svg:width="16.364cm" svg:height="8.163cm" draw:z-index="1"><draw:image xlink:href="Pictures/100002010000072C000003945109895A.png" xlink:type="simple" xlink:show="embed" xlink:actuate="onLoad"/></draw:frame>3. <text:span text:style-name="T2">More Incidents that need to be resolved </text:span></text:p>
          <text:p text:style-name="P4"><draw:frame draw:style-name="fr2" draw:name="graphics3" text:anchor-type="paragraph" svg:width="16.364cm" svg:height="9.204cm" draw:z-index="2"><draw:image xlink:href="Pictures/1000000000000780000004381BCB1AE1.png" xlink:type="simple" xlink:show="embed" xlink:actuate="onLoad"/></draw:frame><text:soft-page-break/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6S</meta:editing-duration>
    <meta:editing-cycles>3</meta:editing-cycles>
    <meta:generator>OpenOffice/4.1.12$Win32 OpenOffice.org_project/4112m1$Build-9809</meta:generator>
    <dc:date>2026-06-30T18:45:34.51</dc:date>
    <meta:document-statistic meta:table-count="0" meta:image-count="3" meta:object-count="0" meta:page-count="2" meta:paragraph-count="5" meta:word-count="41" meta:character-count="258"/>
    <dc:creator>david chipere</dc:creator>
    <meta:user-defined meta:name="Info 1"/>
    <meta:user-defined meta:name="Info 2"/>
    <meta:user-defined meta:name="Info 3"/>
    <meta:user-defined meta:name="Info 4"/>
  </office:meta>
</office:document-meta>
</file>