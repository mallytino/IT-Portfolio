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39A65F08.png"/>
  <manifest:file-entry manifest:media-type="image/png" manifest:full-path="Pictures/100002010000074C000003E90C08BA9D.png"/>
  <manifest:file-entry manifest:media-type="image/png" manifest:full-path="Pictures/1000020100000768000003BCBC98911C.png"/>
  <manifest:file-entry manifest:media-type="image/png" manifest:full-path="Pictures/1000020100000686000003F402A91AEF.png"/>
  <manifest:file-entry manifest:media-type="image/png" manifest:full-path="Pictures/100000000000078000000438E05A98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list-style-name="L1"/>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4">
      <style:paragraph-properties>
        <style:tab-stops>
          <style:tab-stop style:position="12.462cm"/>
        </style:tab-stops>
      </style:paragraph-properties>
      <style:text-properties fo:font-weight="bold" style:font-weight-asian="bold" style:font-weight-complex="bold"/>
    </style:style>
    <style:style style:name="P5" style:family="paragraph" style:parent-style-name="Standard" style:list-style-name="L3">
      <style:paragraph-properties>
        <style:tab-stops>
          <style:tab-stop style:position="12.462cm"/>
        </style:tab-stops>
      </style:paragraph-properties>
      <style:text-properties fo:font-weight="bold" style:font-weight-asian="bold" style:font-weight-complex="bold"/>
    </style:style>
    <style:style style:name="P6" style:family="paragraph" style:parent-style-name="Standard" style:list-style-name="L2"/>
    <style:style style:name="P7" style:family="paragraph" style:parent-style-name="Standard" style:list-style-name="L2">
      <style:paragraph-properties>
        <style:tab-stops>
          <style:tab-stop style:position="12.462cm"/>
        </style:tab-stops>
      </style:paragraph-properties>
    </style:style>
    <style:style style:name="P8" style:family="paragraph" style:parent-style-name="Standard" style:list-style-name="L3">
      <style:paragraph-properties>
        <style:tab-stops>
          <style:tab-stop style:position="12.462cm"/>
        </style:tab-stops>
      </style:paragraph-properties>
    </style:style>
    <style:style style:name="P9" style:family="paragraph" style:parent-style-name="Standard">
      <style:text-properties fo:font-size="18pt" fo:font-weight="normal" style:font-size-asian="18pt" style:font-weight-asian="normal" style:font-size-complex="18pt" style:font-weight-complex="normal"/>
    </style:style>
    <style:style style:name="P10" style:family="paragraph" style:parent-style-name="Standard" style:list-style-name="L2">
      <style:paragraph-properties>
        <style:tab-stops>
          <style:tab-stop style:position="12.462cm"/>
        </style:tab-stops>
      </style:paragraph-properties>
      <style:text-properties fo:font-size="18pt" fo:font-weight="normal" style:font-size-asian="18pt" style:font-weight-asian="normal" style:font-size-complex="18pt" style:font-weight-complex="normal"/>
    </style:style>
    <style:style style:name="P11" style:family="paragraph" style:parent-style-name="Standard" style:list-style-name="L3"/>
    <style:style style:name="P12" style:family="paragraph" style:parent-style-name="Standard" style:list-style-name="L3">
      <style:text-properties fo:font-weight="normal" style:font-weight-asian="normal"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Manager-Exercise 001</text:p>
      <text:p text:style-name="P1"/>
      <text:list xml:id="list7604399990384808086" text:style-name="L1">
        <text:list-item>
          <text:p text:style-name="P2"><text:span text:style-name="T1">Task Manager:</text:span><text:span text:style-name="T2">is a windows tool used to monitor appllictions, processes and system performance </text:span></text:p>
        </text:list-item>
        <text:list-item>
          <text:p text:style-name="P3"><text:span text:style-name="T3">CPU:</text:span><text:span text:style-name="T2">Is the processor its the brain of the computer it does thinking calculations every time you open appliction CPU is working </text:span></text:p>
        </text:list-item>
      </text:list>
      <text:list xml:id="list787909469173138928" text:style-name="L2">
        <text:list-item>
          <text:p text:style-name="P6"><text:span text:style-name="T1">CPU=3%:</text:span><text:span text:style-name="T2">How hard is the bain working right now and 3% is very relaxed nothing demanding is happening cpu is healthy </text:span></text:p>
        </text:list-item>
        <text:list-item>
          <text:p text:style-name="P7"><text:span text:style-name="T1">CPU=70%-99%:</text:span><text:span text:style-name="T2">brain52 is working at basically maximum capacity something is demanding a lot of work causes could be</text:span></text:p>
        </text:list-item>
        <text:list-item>
          <text:p text:style-name="P10">too many programs open</text:p>
        </text:list-item>
        <text:list-item>
          <text:p text:style-name="P10">lots of google chrome tabs </text:p>
        </text:list-item>
        <text:list-item>
          <text:p text:style-name="P10">installing a new software</text:p>
        </text:list-item>
        <text:list-item>
          <text:p text:style-name="P10">updating windows, antivirus scans or broken appliction </text:p>
        </text:list-item>
      </text:list>
      <text:list xml:id="list4754922892189408921" text:style-name="L3">
        <text:list-item>
          <text:p text:style-name="P8"><text:span text:style-name="T1">RAM:</text:span><text:span text:style-name="T2">is temporary memory used by programs while the computer is running programs use RAM quickily</text:span></text:p>
        </text:list-item>
      </text:list>
      <text:list xml:id="list6592781027481099763" text:style-name="L4">
        <text:list-item>
          <text:p text:style-name="P4"><text:span text:style-name="T3">RAM=20%: </text:span><text:span text:style-name="T2">Plenty of free space</text:span></text:p>
        </text:list-item>
        <text:list-item>
          <text:p text:style-name="P4"><text:span text:style-name="T3">RAM =95%-100%:</text:span><text:span text:style-name="T2">the computer is running out of RAM memory space causes could be too many Chrome tabs, mutile programs are open, video editing sofrware</text:span></text:p>
        </text:list-item>
      </text:list>
      <text:list xml:id="list35808446" text:continue-list="list4754922892189408921" text:style-name="L3">
        <text:list-item>
          <text:p text:style-name="P5"><text:span text:style-name="T3">Disk: </text:span><text:span text:style-name="T2">it stores data data permanentley, windows photos, videos, documents, games, applictions and how hard is the storage drive is currently working a high % means the hard drive is very busy this makes the computer slow new softwares updating windows, antivirus scans and file transfers espically make it slow, reading and writing files, dowalading videos files all slow it down </text:span></text:p>
        </text:list-item>
      </text:list>
      <text:p text:style-name="P9"><draw:frame draw:style-name="fr1" draw:name="graphics1" text:anchor-type="paragraph" svg:width="16.999cm" svg:height="9.109cm" draw:z-index="0"><draw:image xlink:href="Pictures/100002010000074C000003E90C08BA9D.png" xlink:type="simple" xlink:show="embed" xlink:actuate="onLoad"/></draw:frame><text:soft-page-break/></text:p>
      <text:p text:style-name="P1"/>
      <text:list xml:id="list35808280" text:continue-numbering="true" text:style-name="L3">
        <text:list-item>
          <text:p text:style-name="P11"><draw:frame draw:style-name="fr1" draw:name="graphics2" text:anchor-type="paragraph" svg:width="16.999cm" svg:height="10.299cm" draw:z-index="1"><draw:image xlink:href="Pictures/1000020100000686000003F402A91AEF.png" xlink:type="simple" xlink:show="embed" xlink:actuate="onLoad"/></draw:frame><text:span text:style-name="T1">Device Manager:</text:span><text:span text:style-name="T2">Is a windows tool used to view and troublesshoot hardware and drivers you can use it if your mouse isnt working keyboard isnt working you access it by going into search bar and typing </text:span><text:span text:style-name="T1">Device Manager</text:span></text:p>
        </text:list-item>
        <text:list-item>
          <text:p text:style-name="P12"><text:span text:style-name="T1">Drivers:</text:span><text:span text:style-name="T3"> Are softwares or files your pc uses too commuicte with hardware</text:span></text:p>
        </text:list-item>
        <text:list-item>
          <text:p text:style-name="P11"><text:soft-page-break/><text:span text:style-name="T1">User accounts</text:span><text:span text:style-name="T2">:is used manage users passwords and permisson user needs a new account, user cant login, user, foregt password,you access it by goint into setting and finding account </text:span></text:p>
        </text:list-item>
        <text:list-item>
          <text:p text:style-name="P11"><text:span text:style-name="T2">Adminstator: has full system control too a standarder user that cannot changes systerm settings.Admistotor grants permision and has control over other users and system</text:span></text:p>
        </text:list-item>
        <text:list-item>
          <text:p text:style-name="P11"><text:span text:style-name="T1">Event Viewer:</text:span><text:span text:style-name="T2">is tool used too invisgate past errors warning and systems failures you access it by going into search bar and typing </text:span><text:span text:style-name="T1">event viewwe</text:span></text:p>
        </text:list-item>
      </text:list>
      <text:p text:style-name="Standard"><text:span text:style-name="T2"/></text:p>
      <text:p text:style-name="Standard"><draw:frame draw:style-name="fr2" draw:name="graphics3" text:anchor-type="paragraph" svg:width="16.999cm" svg:height="8.571cm" draw:z-index="2"><draw:image xlink:href="Pictures/1000020100000768000003BCBC98911C.png" xlink:type="simple" xlink:show="embed" xlink:actuate="onLoad"/></draw:frame><text:span text:style-name="T2"/></text:p>
      <text:p text:style-name="Standard"><draw:frame draw:style-name="fr2" draw:name="graphics4" text:anchor-type="paragraph" svg:width="16.999cm" svg:height="9.56cm" draw:z-index="3"><draw:image xlink:href="Pictures/10000000000007800000043839A65F08.png" xlink:type="simple" xlink:show="embed" xlink:actuate="onLoad"/></draw:frame><text:soft-page-break/><text:span text:style-name="T2"/></text:p>
      <text:p text:style-name="Standard"><draw:frame draw:style-name="fr2" draw:name="graphics5" text:anchor-type="paragraph" svg:width="16.999cm" svg:height="9.56cm" draw:z-index="4"><draw:image xlink:href="Pictures/100000000000078000000438E05A9831.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4H3M42S</meta:editing-duration>
    <meta:editing-cycles>5</meta:editing-cycles>
    <meta:generator>OpenOffice/4.1.12$Win32 OpenOffice.org_project/4112m1$Build-9809</meta:generator>
    <dc:date>2026-06-29T15:52:58.64</dc:date>
    <dc:creator>david chipere</dc:creator>
    <meta:document-statistic meta:table-count="0" meta:image-count="5" meta:object-count="0" meta:page-count="4" meta:paragraph-count="18" meta:word-count="341" meta:character-count="2057"/>
    <meta:user-defined meta:name="Info 1"/>
    <meta:user-defined meta:name="Info 2"/>
    <meta:user-defined meta:name="Info 3"/>
    <meta:user-defined meta:name="Info 4"/>
  </office:meta>
</office:document-meta>
</file>