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39A65F08.png"/>
  <manifest:file-entry manifest:media-type="image/png" manifest:full-path="Pictures/100002010000074C000003E90C08BA9D.png"/>
  <manifest:file-entry manifest:media-type="image/png" manifest:full-path="Pictures/1000020100000768000003BCBC98911C.png"/>
  <manifest:file-entry manifest:media-type="image/png" manifest:full-path="Pictures/1000020100000686000003F402A91AEF.png"/>
  <manifest:file-entry manifest:media-type="image/png" manifest:full-path="Pictures/100000000000078000000438E05A98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18pt" fo:font-weight="normal" style:font-size-asian="18pt" style:font-weight-asian="normal" style:font-size-complex="18pt" style:font-weight-complex="normal"/>
    </style:style>
    <style:style style:name="P3" style:family="paragraph" style:parent-style-name="Text_20_body" style:list-style-name="L5">
      <style:text-properties fo:font-size="18pt" style:font-size-asian="18pt" style:font-size-complex="18pt"/>
    </style:style>
    <style:style style:name="P4" style:family="paragraph" style:parent-style-name="Text_20_body" style:list-style-name="L6">
      <style:text-properties fo:font-size="18pt" style:font-size-asian="18pt" style:font-size-complex="18pt"/>
    </style:style>
    <style:style style:name="P5" style:family="paragraph" style:parent-style-name="Text_20_body">
      <style:text-properties fo:font-size="18pt" fo:font-weight="bold" style:font-size-asian="18pt" style:font-weight-asian="bold" style:font-size-complex="18pt" style:font-weight-complex="bold"/>
    </style:style>
    <style:style style:name="P6" style:family="paragraph" style:parent-style-name="Text_20_body" style:list-style-name="L5">
      <style:paragraph-properties fo:margin-top="0cm" fo:margin-bottom="0cm"/>
      <style:text-properties fo:font-size="18pt" style:font-size-asian="18pt" style:font-size-complex="18pt"/>
    </style:style>
    <style:style style:name="P7" style:family="paragraph" style:parent-style-name="Text_20_body" style:list-style-name="L6">
      <style:paragraph-properties fo:margin-top="0cm" fo:margin-bottom="0cm"/>
      <style:text-properties fo:font-size="18pt" style:font-size-asian="18pt" style:font-size-complex="18pt"/>
    </style:style>
    <style:style style:name="P8" style:family="paragraph" style:parent-style-name="Standard" style:list-style-name="L1"/>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4">
      <style:paragraph-properties>
        <style:tab-stops>
          <style:tab-stop style:position="12.462cm"/>
        </style:tab-stops>
      </style:paragraph-properties>
      <style:text-properties fo:font-weight="bold" style:font-weight-asian="bold" style:font-weight-complex="bold"/>
    </style:style>
    <style:style style:name="P11" style:family="paragraph" style:parent-style-name="Standard" style:list-style-name="L3">
      <style:paragraph-properties>
        <style:tab-stops>
          <style:tab-stop style:position="12.462cm"/>
        </style:tab-stops>
      </style:paragraph-properties>
      <style:text-properties fo:font-weight="bold" style:font-weight-asian="bold" style:font-weight-complex="bold"/>
    </style:style>
    <style:style style:name="P12" style:family="paragraph" style:parent-style-name="Standard" style:list-style-name="L2"/>
    <style:style style:name="P13" style:family="paragraph" style:parent-style-name="Standard" style:list-style-name="L2">
      <style:paragraph-properties>
        <style:tab-stops>
          <style:tab-stop style:position="12.462cm"/>
        </style:tab-stops>
      </style:paragraph-properties>
    </style:style>
    <style:style style:name="P14" style:family="paragraph" style:parent-style-name="Standard" style:list-style-name="L3">
      <style:paragraph-properties>
        <style:tab-stops>
          <style:tab-stop style:position="12.462cm"/>
        </style:tab-stops>
      </style:paragraph-properties>
    </style:style>
    <style:style style:name="P15" style:family="paragraph" style:parent-style-name="Standard" style:list-style-name="L2">
      <style:paragraph-properties>
        <style:tab-stops>
          <style:tab-stop style:position="12.462cm"/>
        </style:tab-stops>
      </style:paragraph-properties>
      <style:text-properties fo:font-size="18pt" fo:font-weight="normal" style:font-size-asian="18pt" style:font-weight-asian="normal" style:font-size-complex="18pt" style:font-weight-complex="normal"/>
    </style:style>
    <style:style style:name="P16" style:family="paragraph" style:parent-style-name="Standard" style:list-style-name="L3">
      <style:text-properties fo:font-size="18pt" fo:font-weight="normal" style:font-size-asian="18pt" style:font-weight-asian="normal" style:font-size-complex="18pt" style:font-weight-complex="normal"/>
    </style:style>
    <style:style style:name="P17" style:family="paragraph" style:parent-style-name="Standard" style:list-style-name="L3">
      <style:paragraph-properties>
        <style:tab-stops>
          <style:tab-stop style:position="12.462cm"/>
        </style:tab-stops>
      </style:paragraph-properties>
      <style:text-properties fo:font-size="18pt" style:font-size-asian="18pt" style:font-size-complex="18pt"/>
    </style:style>
    <style:style style:name="P18" style:family="paragraph" style:parent-style-name="Standard" style:list-style-name="L3"/>
    <style:style style:name="P19" style:family="paragraph" style:parent-style-name="Standard" style:list-style-name="L3">
      <style:text-properties fo:font-weight="normal" style:font-weight-asian="normal"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Manager-Exercise 001</text:p>
      <text:p text:style-name="P1"/>
      <text:list xml:id="list2690136455396460149" text:style-name="L1">
        <text:list-item>
          <text:p text:style-name="P8"><text:span text:style-name="T1">Task Manager:</text:span><text:span text:style-name="T2">is a Windows tool used to monitor applications, processes and system performance. It can be used to identify programs that are using excessive CPU, RAM, Disk </text:span></text:p>
        </text:list-item>
        <text:list-item>
          <text:p text:style-name="P8"><text:span text:style-name="T1">CPU:</text:span><text:span text:style-name="T2">The CPU is the processor and is often called the brain of the computer. It executes instructions, performs calculations and processes data required for programs and the operating system to run.</text:span></text:p>
          <text:p text:style-name="P8"><text:span text:style-name="Strong_20_Emphasis"><text:span text:style-name="T3">CPU = 3%</text:span></text:span><text:span text:style-name="T3"><text:line-break/>The processor is under a very light workload and has plenty of available capacity.</text:span></text:p>
          <text:p text:style-name="P8"><text:span text:style-name="Strong_20_Emphasis"><text:span text:style-name="T3">CPU = 70–99%</text:span></text:span><text:span text:style-name="T3"><text:line-break/>The processor is working under a heavy workload. This can make the computer slow or unresponsive.</text:span></text:p>
          <text:p text:style-name="P8"><text:span text:style-name="T3"/></text:p>
        </text:list-item>
      </text:list>
      <text:p text:style-name="P5">Common causes:</text:p>
      <text:list xml:id="list364253644112838109" text:style-name="L5">
        <text:list-item>
          <text:p text:style-name="P6">Too many applications running </text:p>
        </text:list-item>
        <text:list-item>
          <text:p text:style-name="P6">Multiple Chrome tabs open </text:p>
        </text:list-item>
        <text:list-item>
          <text:p text:style-name="P6">Windows Updates </text:p>
        </text:list-item>
        <text:list-item>
          <text:p text:style-name="P6">Antivirus scans </text:p>
        </text:list-item>
        <text:list-item>
          <text:p text:style-name="P6">Software installation </text:p>
        </text:list-item>
        <text:list-item>
          <text:p text:style-name="P3">Faulty or resource-intensive applications </text:p>
        </text:list-item>
      </text:list>
      <text:list xml:id="list31428449" text:continue-list="list2690136455396460149" text:style-name="L1">
        <text:list-header>
          <text:p text:style-name="P9"><text:span text:style-name="T2"/></text:p>
        </text:list-header>
      </text:list>
      <text:list xml:id="list7154133068076638475" text:style-name="L3">
        <text:list-item>
          <text:p text:style-name="P14"><text:span text:style-name="T1">RAM:</text:span><text:span text:style-name="T2">RAM is temporary memory used by the operating system and applications while the computer is running. It allows programs to access data quickly.</text:span></text:p>
          <text:p text:style-name="P14"><text:span text:style-name="Strong_20_Emphasis"><text:span text:style-name="T3">RAM = 20%</text:span></text:span><text:span text:style-name="T3"><text:line-break/>Plenty of available memory remains.</text:span></text:p>
          <text:p text:style-name="P14"><text:span text:style-name="Strong_20_Emphasis"><text:span text:style-name="T3">RAM = 95–100%</text:span></text:span><text:span text:style-name="T3"><text:line-break/>The computer is running low on available memory, which may cause slow performance.</text:span></text:p>
        </text:list-item>
      </text:list>
      <text:p text:style-name="P5"><text:soft-page-break/>Common causes:</text:p>
      <text:list xml:id="list4042299391699698710" text:style-name="L6">
        <text:list-item>
          <text:p text:style-name="P7">Too many browser tabs </text:p>
        </text:list-item>
        <text:list-item>
          <text:p text:style-name="P7">Multiple applications open </text:p>
        </text:list-item>
        <text:list-item>
          <text:p text:style-name="P7">Video editing software </text:p>
        </text:list-item>
        <text:list-item>
          <text:p text:style-name="P4">Large files or virtual machines </text:p>
        </text:list-item>
      </text:list>
      <text:list xml:id="list31446297" text:continue-list="list7154133068076638475" text:style-name="L3">
        <text:list-header>
          <text:p text:style-name="P17"><text:span text:style-name="T5"/></text:p>
        </text:list-header>
        <text:list-item>
          <text:p text:style-name="P11"><text:span text:style-name="T3">Disk: </text:span><text:span text:style-name="T2">it stores data data permanentley, windows photos, videos, documents, games, applictions and how hard is the storage drive is currently working a high % means the hard drive is very busy this makes the computer slow new softwares updating windows, antivirus scans and file transfers espically make it slow, reading and writing files, dowalading videos files all slow it down </text:span></text:p>
        </text:list-item>
      </text:list>
      <text:p text:style-name="P2"><draw:frame draw:style-name="fr1" draw:name="graphics1" text:anchor-type="paragraph" svg:width="16.999cm" svg:height="9.109cm" draw:z-index="0"><draw:image xlink:href="Pictures/100002010000074C000003E90C08BA9D.png" xlink:type="simple" xlink:show="embed" xlink:actuate="onLoad"/></draw:frame></text:p>
      <text:p text:style-name="P1"/>
      <text:list xml:id="list31452392" text:continue-numbering="true" text:style-name="L3">
        <text:list-item>
          <text:p text:style-name="P18"><draw:frame draw:style-name="fr2" draw:name="graphics2" text:anchor-type="paragraph" svg:width="16.999cm" svg:height="10.299cm" draw:z-index="1"><draw:image xlink:href="Pictures/1000020100000686000003F402A91AEF.png" xlink:type="simple" xlink:show="embed" xlink:actuate="onLoad"/></draw:frame><text:soft-page-break/><text:span text:style-name="T1">Device Manager:</text:span><text:span text:style-name="T2">Is a windows tool used to view and troublesshoot hardware and drivers you can use it if your mouse isnt working keyboard isnt working you access it by going into search bar and typing </text:span><text:span text:style-name="T1">Device Manager</text:span></text:p>
        </text:list-item>
        <text:list-item>
          <text:p text:style-name="P19"><text:span text:style-name="T1">Drivers:</text:span><text:span text:style-name="T3"> Are softwares or files your pc uses too commuicte with hardware</text:span></text:p>
        </text:list-item>
        <text:list-item>
          <text:p text:style-name="P18"><text:span text:style-name="T1">User accounts</text:span><text:span text:style-name="T2">:is used manage users passwords and permisson user needs a new account, user cant login, user, foregt password,you access it by goint into setting and finding account </text:span></text:p>
        </text:list-item>
        <text:list-item>
          <text:p text:style-name="P16"><text:span text:style-name="T4"><text:s/></text:span><text:s/>has full system control too a standarder user that cannot changes systerm settings.Admistotor grants permision and has control over other users and system</text:p>
        </text:list-item>
        <text:list-item>
          <text:p text:style-name="P18"><text:span text:style-name="T1">Event Viewer:</text:span><text:span text:style-name="T2">is tool used too invisgate past errors warning and systems failures you access it by going into search bar and typing </text:span><text:span text:style-name="T1">event viewwe</text:span></text:p>
        </text:list-item>
      </text:list>
      <text:p text:style-name="P2"/>
      <text:p text:style-name="P2"><draw:frame draw:style-name="fr2" draw:name="graphics3" text:anchor-type="paragraph" svg:width="16.999cm" svg:height="8.571cm" draw:z-index="2"><draw:image xlink:href="Pictures/1000020100000768000003BCBC98911C.png" xlink:type="simple" xlink:show="embed" xlink:actuate="onLoad"/></draw:frame><text:soft-page-break/></text:p>
      <text:p text:style-name="P2"><draw:frame draw:style-name="fr1" draw:name="graphics4" text:anchor-type="paragraph" svg:width="16.999cm" svg:height="9.56cm" draw:z-index="3"><draw:image xlink:href="Pictures/10000000000007800000043839A65F08.png" xlink:type="simple" xlink:show="embed" xlink:actuate="onLoad"/></draw:frame></text:p>
      <text:p text:style-name="P2"><draw:frame draw:style-name="fr1" draw:name="graphics5" text:anchor-type="paragraph" svg:width="16.999cm" svg:height="9.56cm" draw:z-index="4"><draw:image xlink:href="Pictures/100000000000078000000438E05A98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1DT13H43M10S</meta:editing-duration>
    <meta:editing-cycles>7</meta:editing-cycles>
    <meta:generator>OpenOffice/4.1.12$Win32 OpenOffice.org_project/4112m1$Build-9809</meta:generator>
    <dc:date>2026-07-15T11:16:19.44</dc:date>
    <dc:creator>david chipere</dc:creator>
    <meta:document-statistic meta:table-count="0" meta:image-count="5" meta:object-count="0" meta:page-count="5" meta:paragraph-count="26" meta:word-count="385" meta:character-count="2338"/>
    <meta:user-defined meta:name="Info 1"/>
    <meta:user-defined meta:name="Info 2"/>
    <meta:user-defined meta:name="Info 3"/>
    <meta:user-defined meta:name="Info 4"/>
  </office:meta>
</office:document-meta>
</file>