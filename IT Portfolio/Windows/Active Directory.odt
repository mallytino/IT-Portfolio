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847562F8.png"/>
  <manifest:file-entry manifest:media-type="image/png" manifest:full-path="Pictures/1000000000000780000004389FDCF406.png"/>
  <manifest:file-entry manifest:media-type="image/png" manifest:full-path="Pictures/100000000000078000000438EF935DF1.png"/>
  <manifest:file-entry manifest:media-type="image/png" manifest:full-path="Pictures/100000000000078000000438E10992B8.png"/>
  <manifest:file-entry manifest:media-type="image/png" manifest:full-path="Pictures/100000000000078000000438AD8A79FC.png"/>
  <manifest:file-entry manifest:media-type="image/png" manifest:full-path="Pictures/100000000000078000000438AF160AC9.png"/>
  <manifest:file-entry manifest:media-type="image/png" manifest:full-path="Pictures/1000000000000780000004382FCB1E22.png"/>
  <manifest:file-entry manifest:media-type="image/png" manifest:full-path="Pictures/1000000000000780000004384DB686F4.png"/>
  <manifest:file-entry manifest:media-type="image/png" manifest:full-path="Pictures/10000000000007800000043892B34B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ext_20_body" style:list-style-name="L1">
      <style:paragraph-properties fo:text-align="start" style:justify-single-word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2">
      <style:paragraph-properties fo:margin-top="0cm" fo:margin-bottom="0cm"/>
    </style:style>
    <style:style style:name="P9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5.4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2.859cm, 0cm, 0cm, 20.32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25.4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22.86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10.16cm, 0cm, 5.08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22.86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e Directory</text:p>
      <text:p text:style-name="P1"/>
      <text:list xml:id="list4540878396670460723" text:style-name="L1">
        <text:list-item>
          <text:p text:style-name="P9"><text:span text:style-name="T2">Active Directory</text:span><text:span text:style-name="T1">:is bascially a company master list of people,computers, one server contols everything all devices, Pcs within the server w</text:span>ithout Active Directory: Every PC has its own users, Every password is managed separately.Every permission is managed separately.It manages and controls all pcs within the server. Example</text:p>
        </text:list-item>
        <text:list-item>
          <text:p text:style-name="P3"><text:span text:style-name="Strong_20_Emphasis">Domain:</text:span>A centrally managed network containing users, computers and resources.Its the school</text:p>
        </text:list-item>
        <text:list-item>
          <text:p text:style-name="P3"><text:span text:style-name="Strong_20_Emphasis">OU:</text:span><text:span text:style-name="Strong_20_Emphasis"><text:span text:style-name="T3">Organisational unit a </text:span></text:span>container in Active Directory used to organise users and computers.the classroom</text:p>
        </text:list-item>
        <text:list-item>
          <text:p text:style-name="P3"><text:span text:style-name="Strong_20_Emphasis">Group:</text:span><text:span text:style-name="Strong_20_Emphasis"><text:span text:style-name="T4">A</text:span></text:span><text:span text:style-name="T4"> c</text:span>ollection of users used to manage permissions efficiently.the students the teamll</text:p>
        </text:list-item>
      </text:list>
      <text:p text:style-name="P2">Active Directory Server</text:p>
      <text:p text:style-name="Standard"/>
      <text:p text:style-name="Standard">├─ David</text:p>
      <text:p text:style-name="Standard">├─ Sarah</text:p>
      <text:p text:style-name="Standard">├─ John</text:p>
      <text:p text:style-name="Standard">├─ Emma</text:p>
      <text:p text:style-name="Standard">│</text:p>
      <text:p text:style-name="Standard">├─ Laptop-001</text:p>
      <text:p text:style-name="Standard">├─ Laptop-002</text:p>
      <text:p text:style-name="Standard">├─ Laptop-003</text:p>
      <text:p text:style-name="Standard">│</text:p>
      <text:p text:style-name="Standard">├─ IT Group</text:p>
      <text:p text:style-name="Standard">├─ Sales Group</text:p>
      <text:p text:style-name="Standard">├─ HR Group</text:p>
      <text:p text:style-name="Standard"/>
      <text:p text:style-name="Standard">David Smith</text:p>
      <text:p text:style-name="Standard">Username: dsmith</text:p>
      <text:p text:style-name="Standard">Password: ********</text:p>
      <text:p text:style-name="Standard">Department: IT</text:p>
      <text:p text:style-name="Standard"/>
      <text:p text:style-name="Text_20_body">Now you can:</text:p>
      <text:list xml:id="list4218005791777430573" text:style-name="L2">
        <text:list-item>
          <text:p text:style-name="P8">Log into your laptop. </text:p>
        </text:list-item>
        <text:list-item>
          <text:p text:style-name="P8">Access company files. </text:p>
        </text:list-item>
        <text:list-item>
          <text:p text:style-name="P8">Use Outlook. </text:p>
        </text:list-item>
        <text:list-item>
          <text:p text:style-name="P8">Use Teams. </text:p>
        </text:list-item>
        <text:list-item>
          <text:p text:style-name="P4">Access printers.</text:p>
        </text:list-item>
      </text:list>
      <text:p text:style-name="Text_20_body"/>
      <text:p text:style-name="Text_20_body">With AD you can </text:p>
      <text:list xml:id="list7487225354939914585" text:style-name="L3">
        <text:list-item>
          <text:p text:style-name="P5">Create user </text:p>
        </text:list-item>
        <text:list-item>
          <text:p text:style-name="P5">Disable user </text:p>
        </text:list-item>
        <text:list-item>
          <text:p text:style-name="P5">Reset password </text:p>
        </text:list-item>
        <text:list-item>
          <text:p text:style-name="P5">Unlock account </text:p>
        </text:list-item>
      </text:list>
      <text:list xml:id="list6945940054083370778" text:style-name="L4">
        <text:list-item>
          <text:p text:style-name="P6">Add user to group </text:p>
        </text:list-item>
      </text:list>
      <text:p text:style-name="Text_20_body"/>
      <text:p text:style-name="Text_20_body"><text:soft-page-break/></text:p>
      <text:p text:style-name="Text_20_body"/>
      <text:p text:style-name="Text_20_body"/>
      <text:list xml:id="list8210883223197547109" text:style-name="L5">
        <text:list-item>
          <text:p text:style-name="P7">Windows virtual server (virtualbox)</text:p>
        </text:list-item>
      </text:list>
      <text:p text:style-name="Text_20_body"><draw:frame draw:style-name="fr1" draw:name="graphics1" text:anchor-type="paragraph" svg:width="16.999cm" svg:height="8.495cm" draw:z-index="0"><draw:image xlink:href="Pictures/1000000000000780000004382FCB1E22.png" xlink:type="simple" xlink:show="embed" xlink:actuate="onLoad"/></draw:frame></text:p>
      <text:p text:style-name="Text_20_body"><draw:frame draw:style-name="fr2" draw:name="graphics5" text:anchor-type="paragraph" svg:x="1.715cm" svg:y="-0.212cm" svg:width="14.101cm" svg:height="8.218cm" draw:z-index="3"><draw:image xlink:href="Pictures/100000000000078000000438AF160AC9.png" xlink:type="simple" xlink:show="embed" xlink:actuate="onLoad"/></draw:frame></text:p>
      <text:p text:style-name="Text_20_body"/>
      <text:p text:style-name="Text_20_body"><draw:frame draw:style-name="fr3" draw:name="graphics3" text:anchor-type="paragraph" svg:x="2.565cm" svg:y="0.048cm" svg:width="14.64cm" svg:height="6.387cm" draw:z-index="2"><draw:image xlink:href="Pictures/1000000000000780000004384DB686F4.png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><draw:frame draw:style-name="fr4" draw:name="graphics7" text:anchor-type="paragraph" svg:x="1.759cm" svg:y="-0.014cm" svg:width="13.757cm" svg:height="10.261cm" draw:z-index="5"><draw:image xlink:href="Pictures/1000000000000780000004389FDCF406.png" xlink:type="simple" xlink:show="embed" xlink:actuate="onLoad"/></draw:frame></text:p>
      <text:p text:style-name="Text_20_body"/>
      <text:p text:style-name="Text_20_body"/>
      <text:p text:style-name="Text_20_body">dllll</text:p>
      <text:p text:style-name="Text_20_body"/>
      <text:p text:style-name="Text_20_body"/>
      <text:p text:style-name="Text_20_body"><draw:frame draw:style-name="fr5" draw:name="graphics2" text:anchor-type="paragraph" svg:x="2.096cm" svg:y="11.077cm" svg:width="14.018cm" svg:height="11.83cm" draw:z-index="1"><draw:image xlink:href="Pictures/100000000000078000000438EF935DF1.png" xlink:type="simple" xlink:show="embed" xlink:actuate="onLoad"/></draw:frame><text:soft-page-break/></text:p>
      <text:p text:style-name="Text_20_body"><draw:frame draw:style-name="fr4" draw:name="graphics4" text:anchor-type="paragraph" svg:x="3.272cm" svg:y="-2cm" svg:width="14.034cm" svg:height="12.552cm" draw:z-index="4"><draw:image xlink:href="Pictures/10000000000007800000043892B34B9B.png" xlink:type="simple" xlink:show="embed" xlink:actuate="onLoad"/></draw:frame></text:p>
      <text:p text:style-name="Text_20_body"/>
      <text:p text:style-name="Text_20_body"/>
      <text:p text:style-name="Text_20_body"><text:soft-page-break/></text:p>
      <text:p text:style-name="Text_20_body"><draw:frame draw:style-name="fr6" draw:name="graphics8" text:anchor-type="paragraph" svg:x="0cm" svg:y="1.386cm" svg:width="11.73cm" svg:height="9.56cm" draw:z-index="7"><draw:image xlink:href="Pictures/100000000000078000000438847562F8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draw:frame draw:style-name="fr7" draw:name="graphics9" text:anchor-type="paragraph" svg:width="12.16cm" svg:height="9.56cm" draw:z-index="8"><draw:image xlink:href="Pictures/100000000000078000000438AD8A79FC.png" xlink:type="simple" xlink:show="embed" xlink:actuate="onLoad"/></draw:frame></text:p>
      <text:p text:style-name="Text_20_body"/>
      <text:p text:style-name="Text_20_body"><draw:frame draw:style-name="fr4" draw:name="graphics6" text:anchor-type="paragraph" svg:x="1.573cm" svg:y="4.849cm" svg:width="13.936cm" svg:height="11.97cm" draw:z-index="6"><draw:image xlink:href="Pictures/100000000000078000000438E10992B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8DT22H6M41S</meta:editing-duration>
    <meta:editing-cycles>7</meta:editing-cycles>
    <meta:generator>OpenOffice/4.1.12$Win32 OpenOffice.org_project/4112m1$Build-9809</meta:generator>
    <dc:date>2026-07-16T08:47:36.37</dc:date>
    <dc:creator>david chipere</dc:creator>
    <meta:document-statistic meta:table-count="0" meta:image-count="9" meta:object-count="0" meta:page-count="6" meta:paragraph-count="36" meta:word-count="173" meta:character-count="1062"/>
    <meta:user-defined meta:name="Info 1"/>
    <meta:user-defined meta:name="Info 2"/>
    <meta:user-defined meta:name="Info 3"/>
    <meta:user-defined meta:name="Info 4"/>
  </office:meta>
</office:document-meta>
</file>