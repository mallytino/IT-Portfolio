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847562F8.png"/>
  <manifest:file-entry manifest:media-type="image/png" manifest:full-path="Pictures/1000000000000780000004389FDCF406.png"/>
  <manifest:file-entry manifest:media-type="image/png" manifest:full-path="Pictures/100000000000078000000438EF935DF1.png"/>
  <manifest:file-entry manifest:media-type="image/png" manifest:full-path="Pictures/100000000000078000000438E10992B8.png"/>
  <manifest:file-entry manifest:media-type="image/png" manifest:full-path="Pictures/100000000000078000000438AD8A79FC.png"/>
  <manifest:file-entry manifest:media-type="image/png" manifest:full-path="Pictures/100000000000078000000438AF160AC9.png"/>
  <manifest:file-entry manifest:media-type="image/png" manifest:full-path="Pictures/1000000000000780000004382FCB1E22.png"/>
  <manifest:file-entry manifest:media-type="image/png" manifest:full-path="Pictures/1000000000000780000004384DB686F4.png"/>
  <manifest:file-entry manifest:media-type="image/png" manifest:full-path="Pictures/10000000000007800000043892B34B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Standard" style:list-style-name="L1"/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5.4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2.859cm, 0cm, 0cm, 20.32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25.4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22.86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10.16cm, 0cm, 5.0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22.8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e Directory</text:p>
      <text:p text:style-name="P1"/>
      <text:list xml:id="list3324474931796251373" text:style-name="L1">
        <text:list-item>
          <text:p text:style-name="P8"><text:span text:style-name="T2">Active Directory</text:span><text:span text:style-name="T1">:is bascially a company master list of people,computers, one server contols everything all devices, Pcs within the server w</text:span>ithout Active Directory: Every PC has its own users, Every password is managed separately.Every permission is managed separately.It manages and controls all pcs within the server. Example</text:p>
        </text:list-item>
      </text:list>
      <text:p text:style-name="Standard"/>
      <text:p text:style-name="P2">Active Directory Server</text:p>
      <text:p text:style-name="Standard"/>
      <text:p text:style-name="Standard">├─ David</text:p>
      <text:p text:style-name="Standard">├─ Sarah</text:p>
      <text:p text:style-name="Standard">├─ John</text:p>
      <text:p text:style-name="Standard">├─ Emma</text:p>
      <text:p text:style-name="Standard">│</text:p>
      <text:p text:style-name="Standard">├─ Laptop-001</text:p>
      <text:p text:style-name="Standard">├─ Laptop-002</text:p>
      <text:p text:style-name="Standard">├─ Laptop-003</text:p>
      <text:p text:style-name="Standard">│</text:p>
      <text:p text:style-name="Standard">├─ IT Group</text:p>
      <text:p text:style-name="Standard">├─ Sales Group</text:p>
      <text:p text:style-name="Standard">├─ HR Group</text:p>
      <text:p text:style-name="Standard"/>
      <text:p text:style-name="Standard">David Smith</text:p>
      <text:p text:style-name="Standard">Username: dsmith</text:p>
      <text:p text:style-name="Standard">Password: ********</text:p>
      <text:p text:style-name="Standard">Department: IT</text:p>
      <text:p text:style-name="Standard"/>
      <text:p text:style-name="Text_20_body">Now you can:</text:p>
      <text:list xml:id="list2247176631600294298" text:style-name="L2">
        <text:list-item>
          <text:p text:style-name="P7">Log into your laptop. </text:p>
        </text:list-item>
        <text:list-item>
          <text:p text:style-name="P7">Access company files. </text:p>
        </text:list-item>
        <text:list-item>
          <text:p text:style-name="P7">Use Outlook. </text:p>
        </text:list-item>
        <text:list-item>
          <text:p text:style-name="P7">Use Teams. </text:p>
        </text:list-item>
        <text:list-item>
          <text:p text:style-name="P3">Access printers.</text:p>
        </text:list-item>
      </text:list>
      <text:p text:style-name="Text_20_body"/>
      <text:p text:style-name="Text_20_body">With AD you can </text:p>
      <text:list xml:id="list3108150891411638952" text:style-name="L3">
        <text:list-item>
          <text:p text:style-name="P4">Create user </text:p>
        </text:list-item>
        <text:list-item>
          <text:p text:style-name="P4">Disable user </text:p>
        </text:list-item>
        <text:list-item>
          <text:p text:style-name="P4">Reset password </text:p>
        </text:list-item>
        <text:list-item>
          <text:p text:style-name="P4">Unlock account </text:p>
        </text:list-item>
      </text:list>
      <text:list xml:id="list349237814305172762" text:style-name="L4">
        <text:list-item>
          <text:p text:style-name="P5">Add user to group </text:p>
        </text:list-item>
      </text:list>
      <text:p text:style-name="Text_20_body"/>
      <text:p text:style-name="Text_20_body"/>
      <text:p text:style-name="Text_20_body"/>
      <text:p text:style-name="Text_20_body"/>
      <text:list xml:id="list8209803260165534092" text:style-name="L5">
        <text:list-item>
          <text:p text:style-name="P6"><text:soft-page-break/>Windows virtual server (virtualbox)</text:p>
        </text:list-item>
      </text:list>
      <text:p text:style-name="Text_20_body"><draw:frame draw:style-name="fr1" draw:name="graphics1" text:anchor-type="paragraph" svg:width="16.999cm" svg:height="8.495cm" draw:z-index="0"><draw:image xlink:href="Pictures/1000000000000780000004382FCB1E22.png" xlink:type="simple" xlink:show="embed" xlink:actuate="onLoad"/></draw:frame></text:p>
      <text:p text:style-name="Text_20_body"><draw:frame draw:style-name="fr2" draw:name="graphics5" text:anchor-type="paragraph" svg:x="1.715cm" svg:y="-0.212cm" svg:width="14.101cm" svg:height="8.218cm" draw:z-index="3"><draw:image xlink:href="Pictures/100000000000078000000438AF160AC9.png" xlink:type="simple" xlink:show="embed" xlink:actuate="onLoad"/></draw:frame></text:p>
      <text:p text:style-name="Text_20_body"/>
      <text:p text:style-name="Text_20_body"><draw:frame draw:style-name="fr3" draw:name="graphics3" text:anchor-type="paragraph" svg:x="2.565cm" svg:y="0.048cm" svg:width="14.64cm" svg:height="6.387cm" draw:z-index="2"><draw:image xlink:href="Pictures/1000000000000780000004384DB686F4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graphics7" text:anchor-type="paragraph" svg:x="1.759cm" svg:y="-0.014cm" svg:width="13.757cm" svg:height="10.261cm" draw:z-index="5"><draw:image xlink:href="Pictures/1000000000000780000004389FDCF406.png" xlink:type="simple" xlink:show="embed" xlink:actuate="onLoad"/></draw:frame></text:p>
      <text:p text:style-name="Text_20_body"/>
      <text:p text:style-name="Text_20_body"/>
      <text:p text:style-name="Text_20_body">dllll</text:p>
      <text:p text:style-name="Text_20_body"/>
      <text:p text:style-name="Text_20_body"/>
      <text:p text:style-name="Text_20_body"><draw:frame draw:style-name="fr5" draw:name="graphics2" text:anchor-type="paragraph" svg:x="2.096cm" svg:y="11.077cm" svg:width="14.018cm" svg:height="11.83cm" draw:z-index="1"><draw:image xlink:href="Pictures/100000000000078000000438EF935DF1.png" xlink:type="simple" xlink:show="embed" xlink:actuate="onLoad"/></draw:frame><text:soft-page-break/></text:p>
      <text:p text:style-name="Text_20_body"><draw:frame draw:style-name="fr4" draw:name="graphics4" text:anchor-type="paragraph" svg:x="3.272cm" svg:y="-2cm" svg:width="14.034cm" svg:height="12.552cm" draw:z-index="4"><draw:image xlink:href="Pictures/10000000000007800000043892B34B9B.png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><draw:frame draw:style-name="fr6" draw:name="graphics8" text:anchor-type="paragraph" svg:x="0cm" svg:y="1.386cm" svg:width="11.73cm" svg:height="9.56cm" draw:z-index="7"><draw:image xlink:href="Pictures/100000000000078000000438847562F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7" draw:name="graphics9" text:anchor-type="paragraph" svg:width="12.16cm" svg:height="9.56cm" draw:z-index="8"><draw:image xlink:href="Pictures/100000000000078000000438AD8A79FC.png" xlink:type="simple" xlink:show="embed" xlink:actuate="onLoad"/></draw:frame></text:p>
      <text:p text:style-name="Text_20_body"/>
      <text:p text:style-name="Text_20_body"><draw:frame draw:style-name="fr4" draw:name="graphics6" text:anchor-type="paragraph" svg:x="1.573cm" svg:y="4.849cm" svg:width="13.936cm" svg:height="11.97cm" draw:z-index="6"><draw:image xlink:href="Pictures/100000000000078000000438E10992B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4H55M21S</meta:editing-duration>
    <meta:editing-cycles>5</meta:editing-cycles>
    <meta:generator>OpenOffice/4.1.12$Win32 OpenOffice.org_project/4112m1$Build-9809</meta:generator>
    <dc:date>2026-07-04T07:24:14.76</dc:date>
    <dc:creator>david chipere</dc:creator>
    <meta:document-statistic meta:table-count="0" meta:image-count="9" meta:object-count="0" meta:page-count="6" meta:paragraph-count="33" meta:word-count="133" meta:character-count="770"/>
    <meta:user-defined meta:name="Info 1"/>
    <meta:user-defined meta:name="Info 2"/>
    <meta:user-defined meta:name="Info 3"/>
    <meta:user-defined meta:name="Info 4"/>
  </office:meta>
</office:document-meta>
</file>