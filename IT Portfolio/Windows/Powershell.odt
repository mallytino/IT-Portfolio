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B40000010921D29219.png"/>
  <manifest:file-entry manifest:media-type="image/png" manifest:full-path="Pictures/1000020100000493000002D8C1F707EB.png"/>
  <manifest:file-entry manifest:media-type="image/png" manifest:full-path="Pictures/10000201000005D7000001FB9F3A5431.png"/>
  <manifest:file-entry manifest:media-type="image/png" manifest:full-path="Pictures/1000020100000749000003545146174A.png"/>
  <manifest:file-entry manifest:media-type="image/png" manifest:full-path="Pictures/1000020100000362000000C49CDEF364.png"/>
  <manifest:file-entry manifest:media-type="image/png" manifest:full-path="Pictures/1000020100000323000001619A73A621.png"/>
  <manifest:file-entry manifest:media-type="image/png" manifest:full-path="Pictures/10000201000004D60000012560EB18F8.png"/>
  <manifest:file-entry manifest:media-type="image/png" manifest:full-path="Pictures/100002010000040900000227C494509A.png"/>
  <manifest:file-entry manifest:media-type="image/png" manifest:full-path="Pictures/10000201000002E600000203860914D9.png"/>
  <manifest:file-entry manifest:media-type="image/png" manifest:full-path="Pictures/10000201000006FE0000017942CE20A4.png"/>
  <manifest:file-entry manifest:media-type="image/png" manifest:full-path="Pictures/10000201000006A70000023A1014E888.png"/>
  <manifest:file-entry manifest:media-type="image/png" manifest:full-path="Pictures/1000020100000759000003C7C97F5839.png"/>
  <manifest:file-entry manifest:media-type="image/png" manifest:full-path="Pictures/10000201000002E90000015A85D52616.png"/>
  <manifest:file-entry manifest:media-type="image/png" manifest:full-path="Pictures/10000201000004C100000138E3E289F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2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5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6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8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9"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10"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11"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12"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Text_20_body" style:list-style-name="L13"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Text_20_body" style:list-style-name="L14"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Text_20_body" style:list-style-name="L15"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Text_20_body" style:list-style-name="L16"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Text_20_body" style:list-style-name="L17"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Text_20_body" style:list-style-name="L18"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 style:parent-style-name="Text_20_body" style:list-style-name="L20"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 style:parent-style-name="Text_20_body" style:list-style-name="L22"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 style:parent-style-name="Text_20_body" style:list-style-name="L19"/>
    <style:style style:name="P22" style:family="paragraph" style:parent-style-name="Text_20_body" style:list-style-name="L21"/>
    <style:style style:name="P23" style:family="paragraph" style:parent-style-name="Text_20_body" style:list-style-name="L23"/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werShell-lab</text:p>
      <text:p text:style-name="P1"/>
      <text:list xml:id="list9015261583955475241" text:style-name="L1">
        <text:list-item>
          <text:p text:style-name="P3">Get-Computer info</text:p>
          <text:p text:style-name="P3">displays information about computer </text:p>
        </text:list-item>
      </text:list>
      <text:list xml:id="list1083549933688578648" text:style-name="L2">
        <text:list-item>
          <text:p text:style-name="P4">windows version </text:p>
        </text:list-item>
        <text:list-item>
          <text:p text:style-name="P4">computer name </text:p>
        </text:list-item>
        <text:list-item>
          <text:p text:style-name="P4">hardware operating system details</text:p>
        </text:list-item>
      </text:list>
      <text:p text:style-name="P1"/>
      <text:p text:style-name="P2"><draw:frame draw:style-name="fr1" draw:name="graphics1" text:anchor-type="paragraph" svg:width="16.999cm" svg:height="8.738cm" draw:z-index="0"><draw:image xlink:href="Pictures/1000020100000759000003C7C97F5839.png" xlink:type="simple" xlink:show="embed" xlink:actuate="onLoad"/></draw:frame></text:p>
      <text:list xml:id="list5912643797378106557" text:style-name="L5">
        <text:list-item>
          <text:p text:style-name="P5">Get-ComputerInfo | Select-Object CsName, WindowsProductName, WindowsVersion, OsArchitecture, CsTotalPhysicalMemory</text:p>
        </text:list-item>
      </text:list>
      <text:list xml:id="list2492208090906304288" text:style-name="L6">
        <text:list-item>
          <text:p text:style-name="P6"><draw:frame draw:style-name="fr2" draw:name="graphics2" text:anchor-type="paragraph" svg:x="0.36cm" svg:y="1.438cm" svg:width="16.364cm" svg:height="4.195cm" draw:z-index="1"><draw:image xlink:href="Pictures/10000201000004C100000138E3E289FF.png" xlink:type="simple" xlink:show="embed" xlink:actuate="onLoad"/></draw:frame>specfic prompt shorter version</text:p>
        </text:list-item>
      </text:list>
      <text:p text:style-name="P2"/>
      <text:p text:style-name="P2"/>
      <text:p text:style-name="P2"/>
      <text:list xml:id="list8244459094469330536" text:style-name="L8">
        <text:list-item>
          <text:p text:style-name="P7"><draw:frame draw:style-name="fr2" draw:name="graphics3" text:anchor-type="paragraph" svg:x="0.347cm" svg:y="1.91cm" svg:width="16.364cm" svg:height="7.475cm" draw:z-index="2"><draw:image xlink:href="Pictures/1000020100000749000003545146174A.png" xlink:type="simple" xlink:show="embed" xlink:actuate="onLoad"/></draw:frame><text:soft-page-break/>Get-Process</text:p>
        </text:list-item>
      </text:list>
      <text:list xml:id="list8633827142301217095" text:style-name="L9">
        <text:list-item>
          <text:p text:style-name="P8">shows applications and process running on pc </text:p>
        </text:list-item>
      </text:list>
      <text:p text:style-name="P2"/>
      <text:p text:style-name="P2"/>
      <text:p text:style-name="P2"/>
      <text:list xml:id="list7060476062526563347" text:style-name="L10">
        <text:list-item>
          <text:p text:style-name="P9"><draw:frame draw:style-name="fr2" draw:name="graphics4" text:anchor-type="paragraph" svg:x="0.642cm" svg:y="1.556cm" svg:width="16.364cm" svg:height="3.872cm" draw:z-index="3"><draw:image xlink:href="Pictures/10000201000004D60000012560EB18F8.png" xlink:type="simple" xlink:show="embed" xlink:actuate="onLoad"/></draw:frame>Get-Process | Sort-Object CPU -Descending | Select-Object -First 10</text:p>
        </text:list-item>
      </text:list>
      <text:list xml:id="list7931941673637094519" text:style-name="L11">
        <text:list-item>
          <text:p text:style-name="P10">processes using up most of the cpu</text:p>
        </text:list-item>
      </text:list>
      <text:p text:style-name="P2"/>
      <text:p text:style-name="P2"/>
      <text:list xml:id="list5727056151685179610" text:style-name="L12">
        <text:list-item>
          <text:p text:style-name="P11">Get-Process |Sort-Object WorkingSet64 -Descending |Select-Object -First 10 Name, Id, CPU,@{Name="MemoryMB"; Expression={[math]::Round($_.WorkingSet64 / 1MB, 2)}}</text:p>
        </text:list-item>
      </text:list>
      <text:list xml:id="list469143733086320091" text:style-name="L13">
        <text:list-item>
          <text:p text:style-name="P13"><draw:frame draw:style-name="fr2" draw:name="graphics5" text:anchor-type="paragraph" svg:x="0.464cm" svg:y="1.115cm" svg:width="16.364cm" svg:height="7.191cm" draw:z-index="4"><draw:image xlink:href="Pictures/1000020100000323000001619A73A621.png" xlink:type="simple" xlink:show="embed" xlink:actuate="onLoad"/></draw:frame>find the processes using the most memory</text:p>
        </text:list-item>
      </text:list>
      <text:p text:style-name="P12"/>
      <text:p text:style-name="P12"><text:soft-page-break/></text:p>
      <text:list xml:id="list8761885833738181598" text:style-name="L14">
        <text:list-item>
          <text:p text:style-name="P14">Get-Service</text:p>
        </text:list-item>
      </text:list>
      <text:list xml:id="list7241081830763015366" text:style-name="L15">
        <text:list-item>
          <text:p text:style-name="P15">checks services</text:p>
        </text:list-item>
      </text:list>
      <text:list xml:id="list6271149746514164221" text:style-name="L16">
        <text:list-item>
          <text:p text:style-name="P16"><draw:frame draw:style-name="fr1" draw:name="graphics6" text:anchor-type="paragraph" svg:width="16.999cm" svg:height="5.689cm" draw:z-index="5"><draw:image xlink:href="Pictures/10000201000006A70000023A1014E888.png" xlink:type="simple" xlink:show="embed" xlink:actuate="onLoad"/></draw:frame>Get-Service | Where-Object Status -eq "Stopped"</text:p>
        </text:list-item>
      </text:list>
      <text:p text:style-name="P12"><draw:frame draw:style-name="fr3" draw:name="graphics7" text:anchor-type="paragraph" svg:width="15.769cm" svg:height="7.324cm" draw:z-index="6"><draw:image xlink:href="Pictures/10000201000002E90000015A85D52616.png" xlink:type="simple" xlink:show="embed" xlink:actuate="onLoad"/></draw:frame></text:p>
      <text:list xml:id="list32775314" text:continue-numbering="true" text:style-name="L16">
        <text:list-item>
          <text:p text:style-name="P16">Get-NetIPAddress </text:p>
        </text:list-item>
      </text:list>
      <text:list xml:id="list8219161617646854568" text:style-name="L17">
        <text:list-item>
          <text:p text:style-name="P17">gives networking information</text:p>
        </text:list-item>
      </text:list>
      <text:p text:style-name="P12"/>
      <text:p text:style-name="P12"><draw:frame draw:style-name="fr2" draw:name="graphics8" text:anchor-type="paragraph" svg:x="0.469cm" svg:y="-0.182cm" svg:width="16.999cm" svg:height="5.764cm" draw:z-index="7"><draw:image xlink:href="Pictures/10000201000005D7000001FB9F3A5431.png" xlink:type="simple" xlink:show="embed" xlink:actuate="onLoad"/></draw:frame></text:p>
      <text:p text:style-name="P12"/>
      <text:p text:style-name="P12"><draw:frame draw:style-name="fr2" draw:name="graphics9" text:anchor-type="paragraph" svg:x="0.323cm" svg:y="0.52cm" svg:width="16.999cm" svg:height="3.579cm" draw:z-index="8"><draw:image xlink:href="Pictures/10000201000006FE0000017942CE20A4.png" xlink:type="simple" xlink:show="embed" xlink:actuate="onLoad"/></draw:frame><text:soft-page-break/></text:p>
      <text:p text:style-name="P12"/>
      <text:list xml:id="list6892518242458880477" text:style-name="L18">
        <text:list-item>
          <text:p text:style-name="P18">Test-Connection google.com -Count 4</text:p>
        </text:list-item>
      </text:list>
      <text:list xml:id="list1797267813005402403" text:style-name="L19">
        <text:list-item>
          <text:p text:style-name="P21"><text:span text:style-name="T1">test internet connectivity</text:span></text:p>
        </text:list-item>
      </text:list>
      <text:list xml:id="list1246279398775956800" text:style-name="L20">
        <text:list-item>
          <text:p text:style-name="P19"><draw:frame draw:style-name="fr1" draw:name="graphics10" text:anchor-type="paragraph" svg:width="16.999cm" svg:height="3.847cm" draw:z-index="9"><draw:image xlink:href="Pictures/1000020100000362000000C49CDEF364.png" xlink:type="simple" xlink:show="embed" xlink:actuate="onLoad"/></draw:frame>Resolve-DnsName google.com</text:p>
        </text:list-item>
      </text:list>
      <text:list xml:id="list9128948627604463089" text:style-name="L21">
        <text:list-item>
          <text:p text:style-name="P22"><text:span text:style-name="T1">Test DNS resolution</text:span></text:p>
        </text:list-item>
      </text:list>
      <text:list xml:id="list6657845025631245301" text:style-name="L22">
        <text:list-header>
          <text:p text:style-name="P20"><draw:frame draw:style-name="fr4" draw:name="graphics11" text:anchor-type="paragraph" svg:width="16.999cm" svg:height="10.566cm" draw:z-index="10"><draw:image xlink:href="Pictures/1000020100000493000002D8C1F707EB.png" xlink:type="simple" xlink:show="embed" xlink:actuate="onLoad"/></draw:frame></text:p>
        </text:list-header>
      </text:list>
      <text:p text:style-name="P12"/>
      <text:p text:style-name="P12"/>
      <text:p text:style-name="P12"/>
      <text:p text:style-name="P12"/>
      <text:list xml:id="list32788844" text:continue-numbering="true" text:style-name="L22">
        <text:list-item>
          <text:p text:style-name="P20"><text:soft-page-break/>Get-LocalUser</text:p>
        </text:list-item>
        <text:list-item>
          <text:p text:style-name="P20">Get-LocalGroup</text:p>
        </text:list-item>
        <text:list-item>
          <text:p text:style-name="P20">Get-LocalGroupMember -Group "Administrators"</text:p>
        </text:list-item>
      </text:list>
      <text:list xml:id="list284807061064752576" text:style-name="L23">
        <text:list-item>
          <text:p text:style-name="P23"><draw:frame draw:style-name="fr5" draw:name="graphics12" text:anchor-type="paragraph" svg:x="0.418cm" svg:y="0.917cm" svg:width="15.707cm" svg:height="10.901cm" draw:z-index="11"><draw:image xlink:href="Pictures/10000201000002E600000203860914D9.png" xlink:type="simple" xlink:show="embed" xlink:actuate="onLoad"/></draw:frame><text:span text:style-name="T1">checking users and groups </text:span></text:p>
        </text:list-item>
      </text:list>
      <text:p text:style-name="Text_20_body"><text:span text:style-name="T1"/></text:p>
      <text:p text:style-name="Text_20_body"><draw:frame draw:style-name="fr1" draw:name="graphics13" text:anchor-type="paragraph" svg:width="16.999cm" svg:height="9.065cm" draw:z-index="12"><draw:image xlink:href="Pictures/100002010000040900000227C494509A.png" xlink:type="simple" xlink:show="embed" xlink:actuate="onLoad"/></draw:frame><text:span text:style-name="T1"/></text:p>
      <text:p text:style-name="Text_20_body"><text:span text:style-name="T1"/></text:p>
      <text:p text:style-name="Text_20_body"><text:span text:style-name="T1"/></text:p>
      <text:p text:style-name="Text_20_body"><text:soft-page-break/><text:span text:style-name="T1"/></text:p>
      <text:p text:style-name="Text_20_body"><draw:frame draw:style-name="fr1" draw:name="graphics14" text:anchor-type="paragraph" svg:width="16.999cm" svg:height="4.75cm" draw:z-index="13"><draw:image xlink:href="Pictures/10000201000003B40000010921D29219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2M59S</meta:editing-duration>
    <meta:editing-cycles>3</meta:editing-cycles>
    <meta:generator>OpenOffice/4.1.12$Win32 OpenOffice.org_project/4112m1$Build-9809</meta:generator>
    <dc:date>2026-07-19T12:51:00.54</dc:date>
    <meta:document-statistic meta:table-count="0" meta:image-count="14" meta:object-count="0" meta:page-count="6" meta:paragraph-count="27" meta:word-count="131" meta:character-count="993"/>
    <meta:user-defined meta:name="Info 1"/>
    <meta:user-defined meta:name="Info 2"/>
    <meta:user-defined meta:name="Info 3"/>
    <meta:user-defined meta:name="Info 4"/>
  </office:meta>
</office:document-meta>
</file>