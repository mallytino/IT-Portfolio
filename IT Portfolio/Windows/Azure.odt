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9F85B69E.png"/>
  <manifest:file-entry manifest:media-type="image/png" manifest:full-path="Pictures/100000000000078000000438FD841924.png"/>
  <manifest:file-entry manifest:media-type="image/png" manifest:full-path="Pictures/100000000000078000000438E9FA18F6.png"/>
  <manifest:file-entry manifest:media-type="image/png" manifest:full-path="Pictures/100000000000078000000438A595188B.png"/>
  <manifest:file-entry manifest:media-type="image/png" manifest:full-path="Pictures/100002010000077D0000032757BBE5BE.png"/>
  <manifest:file-entry manifest:media-type="image/png" manifest:full-path="Pictures/100000000000078000000438E1742E8D.png"/>
  <manifest:file-entry manifest:media-type="image/png" manifest:full-path="Pictures/1000020100000764000003E99674D8B8.png"/>
  <manifest:file-entry manifest:media-type="image/png" manifest:full-path="Pictures/1000000000000780000004384DA13A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Azure</text:p>
      <text:p text:style-name="Standard"/>
      <text:list xml:id="list1414265289168555249" text:style-name="L1">
        <text:list-item>
          <text:p text:style-name="P2">Resource groups</text:p>
        </text:list-item>
      </text:list>
      <text:p text:style-name="Standard"><draw:frame draw:style-name="fr1" draw:name="graphics1" text:anchor-type="paragraph" svg:width="16.242cm" svg:height="8.578cm" draw:z-index="0"><draw:image xlink:href="Pictures/1000020100000764000003E99674D8B8.png" xlink:type="simple" xlink:show="embed" xlink:actuate="onLoad"/></draw:frame><draw:frame draw:style-name="fr2" draw:name="graphics2" text:anchor-type="paragraph" svg:x="0cm" svg:y="9.467cm" svg:width="13.12cm" svg:height="7.207cm" draw:z-index="1"><draw:image xlink:href="Pictures/100000000000078000000438E1742E8D.png" xlink:type="simple" xlink:show="embed" xlink:actuate="onLoad"/></draw:frame></text:p>
      <text:list xml:id="list28545977" text:continue-numbering="true" text:style-name="L1">
        <text:list-item>
          <text:p text:style-name="P2">Created a user</text:p>
        </text:list-item>
      </text:list>
      <text:p text:style-name="Standard"><draw:frame draw:style-name="fr2" draw:name="graphics4" text:anchor-type="paragraph" svg:x="0.476cm" svg:y="0.31cm" svg:width="12.326cm" svg:height="6.301cm" draw:z-index="2"><draw:image xlink:href="Pictures/100000000000078000000438E9FA18F6.png" xlink:type="simple" xlink:show="embed" xlink:actuate="onLoad"/></draw:frame></text:p>
      <text:list xml:id="list28577867" text:continue-numbering="true" text:style-name="L1">
        <text:list-item>
          <text:p text:style-name="P2"><draw:frame draw:style-name="fr3" draw:name="graphics5" text:anchor-type="paragraph" svg:x="0.415cm" svg:y="12.234cm" svg:width="16.364cm" svg:height="9.204cm" draw:z-index="4"><draw:image xlink:href="Pictures/100000000000078000000438A595188B.png" xlink:type="simple" xlink:show="embed" xlink:actuate="onLoad"/></draw:frame><draw:frame draw:style-name="fr3" draw:name="graphics3" text:anchor-type="paragraph" svg:x="0.469cm" svg:y="0.896cm" svg:width="16.699cm" svg:height="9.56cm" draw:z-index="3"><draw:image xlink:href="Pictures/100000000000078000000438FD841924.png" xlink:type="simple" xlink:show="embed" xlink:actuate="onLoad"/></draw:frame><text:soft-page-break/>Creeated group and added memmbers </text:p>
        </text:list-item>
        <text:list-item>
          <text:p text:style-name="P2">Created storage acccount using resourc group</text:p>
        </text:list-item>
      </text:list>
      <text:p text:style-name="Standard"/>
      <text:p text:style-name="Standard"/>
      <text:p text:style-name="Standard"/>
      <text:p text:style-name="Standard"><draw:frame draw:style-name="fr4" draw:name="graphics6" text:anchor-type="paragraph" svg:width="16.999cm" svg:height="9.56cm" draw:z-index="5"><draw:image xlink:href="Pictures/1000000000000780000004384DA13A6D.png" xlink:type="simple" xlink:show="embed" xlink:actuate="onLoad"/></draw:frame><text:soft-page-break/></text:p>
      <text:p text:style-name="Standard"/>
      <text:list xml:id="list28551541" text:continue-numbering="true" text:style-name="L1">
        <text:list-item>
          <text:p text:style-name="P2">creating a container</text:p>
        </text:list-item>
        <text:list-item>
          <text:p text:style-name="P2"><draw:frame draw:style-name="fr5" draw:name="graphics7" text:anchor-type="paragraph" svg:width="16.999cm" svg:height="9.56cm" draw:z-index="6"><draw:image xlink:href="Pictures/1000000000000780000004389F85B69E.png" xlink:type="simple" xlink:show="embed" xlink:actuate="onLoad"/></draw:frame><draw:frame draw:style-name="fr6" draw:name="graphics8" text:anchor-type="paragraph" svg:width="16.364cm" svg:height="6.888cm" draw:z-index="7"><draw:image xlink:href="Pictures/100002010000077D0000032757BBE5BE.png" xlink:type="simple" xlink:show="embed" xlink:actuate="onLoad"/></draw:frame>uploaded a file </text:p>
        </text:list-item>
      </text:list>
      <text:p text:style-name="Standard"/>
      <text:p text:style-name="Standard"/>
      <text:p text:style-name="Standard"><draw:frame draw:style-name="fr3" draw:name="graphics9" text:anchor-type="paragraph" svg:x="0cm" svg:y="2cm" svg:width="16.999cm" svg:height="7.154cm" draw:z-index="8"><draw:image xlink:href="Pictures/100002010000077D0000032757BBE5BE.png" xlink:type="simple" xlink:show="embed" xlink:actuate="onLoad"/></draw:frame><text:soft-page-break/>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52S</meta:editing-duration>
    <meta:editing-cycles>3</meta:editing-cycles>
    <meta:generator>OpenOffice/4.1.12$Win32 OpenOffice.org_project/4112m1$Build-9809</meta:generator>
    <dc:date>2026-07-18T08:28:50.69</dc:date>
    <meta:document-statistic meta:table-count="0" meta:image-count="9" meta:object-count="0" meta:page-count="4" meta:paragraph-count="8" meta:word-count="31" meta:character-count="171"/>
    <dc:creator>david chipere</dc:creator>
    <meta:user-defined meta:name="Info 1"/>
    <meta:user-defined meta:name="Info 2"/>
    <meta:user-defined meta:name="Info 3"/>
    <meta:user-defined meta:name="Info 4"/>
  </office:meta>
</office:document-meta>
</file>